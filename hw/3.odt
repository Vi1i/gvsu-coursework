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Fira Mono for Powerline" svg:font-family="'Fira Mono for Powerline'" style:font-family-generic="swiss" style:font-pitch="variable"/>
    <style:font-face style:name="Calibri1" svg:font-family="Calibri" style:font-family-generic="system" style:font-pitch="variable"/>
    <style:font-face style:name="Fira Mono for Powerline1" svg:font-family="'Fira Mono for Powerline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style:font-name="Inconsolata for Powerline"/>
    </style:style>
    <style:style style:name="P2" style:family="paragraph" style:parent-style-name="Standard">
      <style:text-properties style:font-name="Inconsolata for Powerline" officeooo:paragraph-rsid="0002cea1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Inconsolata for Powerline"/>
    </style:style>
    <style:style style:name="P4" style:family="paragraph" style:parent-style-name="Standard">
      <style:paragraph-properties fo:margin-left="1in" fo:margin-right="0in" fo:text-indent="0in" style:auto-text-indent="false"/>
      <style:text-properties style:font-name="Inconsolata for Powerline"/>
    </style:style>
    <style:style style:name="P5" style:family="paragraph" style:parent-style-name="Header">
      <style:paragraph-properties fo:line-height="100%"/>
      <style:text-properties style:font-name="Inconsolata for Powerline" officeooo:rsid="0002cea1" officeooo:paragraph-rsid="0002cea1"/>
    </style:style>
    <style:style style:name="P6" style:family="paragraph" style:parent-style-name="Footer">
      <style:text-properties style:font-name="Inconsolata for Powerline"/>
    </style:style>
    <style:style style:name="T1" style:family="text">
      <style:text-properties style:font-name="Times" style:text-underline-style="solid" style:text-underline-width="auto" style:text-underline-color="font-color" fo:font-weight="bold" officeooo:rsid="00046467" style:font-weight-asian="bold" style:font-name-complex="Times1" style:font-size-complex="10pt" style:font-weight-complex="bold"/>
    </style:style>
    <style:style style:name="T2" style:family="text">
      <style:text-properties style:font-name="Times" style:font-name-complex="Times1" style:font-size-complex="10pt" style:font-weight-complex="bold"/>
    </style:style>
    <style:style style:name="T3" style:family="text">
      <style:text-properties style:font-name="Times" fo:font-weight="bold" style:font-weight-asian="bold" style:font-name-complex="Times1" style:font-size-complex="10pt" style:font-weight-complex="bold"/>
    </style:style>
    <style:style style:name="T4" style:family="text">
      <style:text-properties style:text-line-through-style="solid" style:text-line-through-type="single" style:font-name="Times" style:font-name-complex="Times1" style:font-size-complex="10pt" style:font-weight-complex="bold"/>
    </style:style>
    <style:style style:name="T5" style:family="text">
      <style:text-properties style:text-line-through-style="solid" style:text-line-through-type="single" style:font-name="Times" style:font-name-complex="Times1" style:font-size-complex="10pt" style:font-weight-complex="bold" style:text-overline-style="none" style:text-overline-color="font-color"/>
    </style:style>
    <style:style style:name="T6" style:family="text">
      <style:text-properties style:text-line-through-style="solid" style:text-line-through-type="single" style:font-name="Times" officeooo:rsid="00046467" style:font-name-complex="Times1" style:font-size-complex="10pt" style:font-weight-complex="bold"/>
    </style:style>
    <style:style style:name="T7" style:family="text">
      <style:text-properties style:text-line-through-style="solid" style:text-line-through-type="single" style:font-name-complex="Times1" style:font-size-complex="10pt" style:font-weight-complex="bold"/>
    </style:style>
    <style:style style:name="T8" style:family="text">
      <style:text-properties style:text-line-through-style="solid" style:text-line-through-type="single" style:font-name-complex="Times1" style:font-size-complex="10pt" style:font-weight-complex="bold" style:text-overline-style="none" style:text-overline-color="font-color"/>
    </style:style>
    <style:style style:name="T9" style:family="text">
      <style:text-properties style:text-line-through-style="solid" style:text-line-through-type="single" officeooo:rsid="00046467" style:font-name-complex="Times1" style:font-size-complex="10pt" style:font-weight-complex="bold"/>
    </style:style>
    <style:style style:name="T10" style:family="text">
      <style:text-properties style:text-line-through-style="none" style:text-line-through-type="none" style:font-name-complex="Times1" style:font-size-complex="10pt" style:font-weight-complex="bold"/>
    </style:style>
    <style:style style:name="T11" style:family="text">
      <style:text-properties style:font-name-complex="Times1" style:font-size-complex="10pt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46467" style:font-weight-asian="bold" style:font-name-complex="Times1" style:font-size-complex="10pt" style:font-weight-complex="bold"/>
    </style:style>
    <style:style style:name="T13" style:family="text">
      <style:text-properties fo:font-weight="bold" style:font-weight-asian="bold" style:font-name-complex="Times1" style:font-size-complex="10pt" style:font-weight-complex="bold"/>
    </style:style>
    <style:style style:name="T14" style:family="text">
      <style:text-properties officeooo:rsid="000912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Assignment 3</text:p>
      <text:p text:style-name="P1"><text:span text:style-name="T11">1. <text:s/></text:span><text:span text:style-name="T12">Services</text:span><text:span text:style-name="T11"> control determines the types of Internet services that can be accessed, inbound or outbound.</text:span></text:p>
      <text:p text:style-name="P4"><text:span text:style-name="T8">A. <text:s/>Behavior</text:span><text:span text:style-name="T11"><text:tab/><text:tab/><text:tab/><text:tab/></text:span><text:span text:style-name="T7">B. <text:s/>Direction</text:span></text:p>
      <text:p text:style-name="P4"><text:span text:style-name="T13">C. <text:s/>Service</text:span><text:span text:style-name="T11"><text:tab/><text:tab/><text:tab/><text:tab/><text:tab/></text:span><text:span text:style-name="T7">D. <text:s/>User</text:span></text:p>
      <text:p text:style-name="P1"><text:span text:style-name="T11">2. <text:s/></text:span><text:span text:style-name="T12">Behavior</text:span><text:span text:style-name="T11"> control controls how particular services are used.</text:span></text:p>
      <text:p text:style-name="P1"><text:span text:style-name="T11"><text:tab/><text:tab/></text:span><text:span text:style-name="T7">A. <text:s/>Service</text:span><text:span text:style-name="T11"><text:tab/><text:tab/><text:tab/><text:tab/><text:tab/></text:span><text:span text:style-name="T13">B. <text:s/>Behavior</text:span></text:p>
      <text:p text:style-name="P1"><text:span text:style-name="T11"><text:tab/><text:tab/></text:span><text:span text:style-name="T7">C. <text:s/>User</text:span><text:span text:style-name="T11"><text:tab/><text:tab/><text:tab/><text:tab/><text:tab/></text:span><text:span text:style-name="T7">D. <text:s/>Direction</text:span></text:p>
      <text:p text:style-name="P1"><text:span text:style-name="T11">3. <text:s/></text:span><text:span text:style-name="T12">Direction</text:span><text:span text:style-name="T11"> control determines the direction in which particular service requests may be initiated and allowed to flow through the firewall.</text:span></text:p>
      <text:p text:style-name="P1"><text:span text:style-name="T11"><text:tab/><text:tab/></text:span><text:span text:style-name="T7">A. <text:s/>Behavior</text:span><text:span text:style-name="T11"><text:tab/><text:tab/><text:tab/><text:tab/></text:span><text:span text:style-name="T7">B. <text:s/>User</text:span></text:p>
      <text:p text:style-name="P1"><text:span text:style-name="T11"><text:tab/><text:tab/></text:span><text:span text:style-name="T13">C. <text:s/>Direction</text:span><text:span text:style-name="T11"><text:tab/><text:tab/><text:tab/><text:tab/></text:span><text:span text:style-name="T7">D. <text:s/>Service</text:span></text:p>
      <text:p text:style-name="P1"><text:span text:style-name="T11">4. <text:s/></text:span><text:span text:style-name="T12">User</text:span><text:span text:style-name="T11"> control controls access to a service according to which user is attempting to access it.</text:span></text:p>
      <text:p text:style-name="P1"><text:span text:style-name="T11"><text:tab/><text:tab/></text:span><text:span text:style-name="T13">A. <text:s/>User</text:span><text:span text:style-name="T11"><text:tab/><text:tab/><text:tab/><text:tab/><text:tab/></text:span><text:span text:style-name="T7">B. <text:s/>Direction</text:span></text:p>
      <text:p text:style-name="P1"><text:span text:style-name="T11"><text:tab/><text:tab/></text:span><text:span text:style-name="T7">C. <text:s/>Service</text:span><text:span text:style-name="T11"><text:tab/><text:tab/><text:tab/><text:tab/><text:tab/></text:span><text:span text:style-name="T7">D. <text:s/>Behavior</text:span></text:p>
      <text:p text:style-name="P1"><text:span text:style-name="T11">5. <text:s/>The </text:span><text:span text:style-name="T12">IP Protocol field</text:span><text:span text:style-name="T11"> defines the transport protocol.</text:span></text:p>
      <text:p text:style-name="P1"><text:span text:style-name="T11"><text:tab/><text:tab/></text:span><text:span text:style-name="T7">A. <text:s/>destination IP address</text:span><text:span text:style-name="T11"><text:tab/><text:tab/></text:span><text:span text:style-name="T7">B. <text:s/>source IP address</text:span></text:p>
      <text:p text:style-name="P1"><text:span text:style-name="T11"><text:tab/><text:tab/></text:span><text:span text:style-name="T7">C. <text:s/>interface</text:span><text:span text:style-name="T11"><text:tab/><text:tab/><text:tab/><text:tab/></text:span><text:span text:style-name="T13">D. <text:s/>IP protocol field</text:span></text:p>
      <text:p text:style-name="P1"><text:span text:style-name="T11">6. <text:s/>A </text:span><text:span text:style-name="T12">circuit-level</text:span><text:span text:style-name="T11"> gateway sets up two TCP connections, one between itself and a TCP user on an inner host and one between itself and a TCP user on an outside host.</text:span></text:p>
      <text:p text:style-name="P1"><text:span text:style-name="T11"><text:tab/><text:tab/></text:span><text:span text:style-name="T7">A. <text:s/>packet filtering</text:span><text:span text:style-name="T11"><text:tab/><text:tab/><text:tab/></text:span><text:span text:style-name="T7">B. <text:s/>stateful inspection</text:span></text:p>
      <text:p text:style-name="P1"><text:span text:style-name="T11"><text:tab/><text:tab/></text:span><text:span text:style-name="T7">C. <text:s/>application-level</text:span><text:span text:style-name="T11"><text:tab/><text:tab/><text:tab/></text:span><text:span text:style-name="T13">D. <text:s/>circuit-level</text:span></text:p>
      <text:p text:style-name="P1"><text:span text:style-name="T11">7. <text:s/>An example of a circuit-level gateway implementation is the </text:span><text:span text:style-name="T12">SOCKS</text:span><text:span text:style-name="T11"> package.</text:span></text:p>
      <text:p text:style-name="P1"><text:span text:style-name="T11"><text:tab/><text:tab/></text:span><text:span text:style-name="T7">A. <text:s/>application-level</text:span><text:span text:style-name="T11"><text:tab/><text:tab/><text:tab/></text:span><text:span text:style-name="T13">B. SOCKS</text:span></text:p>
      <text:p text:style-name="P1"><text:span text:style-name="T11"><text:tab/><text:tab/></text:span><text:span text:style-name="T7">C. <text:s/>SMTP</text:span><text:span text:style-name="T11"><text:tab/><text:tab/><text:tab/><text:tab/><text:tab/></text:span><text:span text:style-name="T7">D. <text:s/>stateful inspection</text:span></text:p>
      <text:p text:style-name="P1"><text:soft-page-break/><text:span text:style-name="T11">8. <text:s/>Typically the systems in the </text:span><text:span text:style-name="T12">DMZ</text:span><text:span text:style-name="T11"> require or foster external connectivity such as a corporate Web site, an e-mail server, or a DNS server.</text:span></text:p>
      <text:p text:style-name="P1"><text:span text:style-name="T11"><text:tab/><text:tab/></text:span><text:span text:style-name="T13">A. <text:s/>DMZ</text:span><text:span text:style-name="T11"><text:tab/><text:tab/><text:tab/><text:tab/><text:tab/></text:span><text:span text:style-name="T7">B. <text:s/>IP protocol field</text:span></text:p>
      <text:p text:style-name="P1"><text:span text:style-name="T11"><text:tab/><text:tab/></text:span><text:span text:style-name="T7">C. <text:s/>boundary firewall</text:span><text:span text:style-name="T11"><text:tab/><text:tab/><text:tab/></text:span><text:span text:style-name="T7">D. <text:s/>VPN</text:span></text:p>
      <text:p text:style-name="P1"><text:span text:style-name="T11">9. <text:s/>A </text:span><text:span text:style-name="T12">VPN</text:span><text:span text:style-name="T11"> consists of a set of computers that interconnect by means of a relatively unsecure network and makes use of encryption and special protocols to provide security.</text:span></text:p>
      <text:p text:style-name="P1"><text:span text:style-name="T11"><text:tab/><text:tab/></text:span><text:span text:style-name="T7">A. <text:s/>proxy</text:span><text:span text:style-name="T11"><text:tab/><text:tab/><text:tab/><text:tab/><text:tab/></text:span><text:span text:style-name="T7">B. <text:s/>UTM</text:span></text:p>
      <text:p text:style-name="P1"><text:span text:style-name="T11"><text:tab/><text:tab/></text:span><text:span text:style-name="T13">C. <text:s/>VPN</text:span><text:span text:style-name="T11"><text:tab/><text:tab/><text:tab/><text:tab/><text:tab/></text:span><text:span text:style-name="T7">D. <text:s/>stateful inspection</text:span><text:span text:style-name="T11"> <text:tab/><text:tab/><text:tab/><text:tab/><text:tab/><text:tab/><text:tab/><text:tab/> <text:s text:c="3"/></text:span><text:span text:style-name="T7">firewall</text:span></text:p>
      <text:p text:style-name="P1"><text:span text:style-name="T11">10. <text:s/>A </text:span><text:span text:style-name="T12">distributed firewall</text:span><text:span text:style-name="T11"> configuration involves stand-alone firewall devices plus host-based firewalls working together under a central administrative control.</text:span></text:p>
      <text:p text:style-name="P1"><text:span text:style-name="T11"><text:tab/><text:tab/></text:span><text:span text:style-name="T7">A. <text:s/>packet filtering firewall<text:tab/></text:span><text:span text:style-name="T11"><text:tab/></text:span><text:span text:style-name="T13">B. <text:s/>distributed <text:tab/><text:tab/><text:tab/><text:tab/><text:tab/><text:tab/><text:tab/><text:tab/><text:tab/> <text:s text:c="9"/>firewall</text:span></text:p>
      <text:p text:style-name="P1"><text:span text:style-name="T11"><text:tab/><text:tab/></text:span><text:span text:style-name="T7">C. <text:s/>personal firewall</text:span><text:span text:style-name="T11"><text:tab/><text:tab/><text:tab/></text:span><text:span text:style-name="T7">D. <text:s/>stateful inspection</text:span><text:span text:style-name="T11"> <text:tab/><text:tab/><text:tab/><text:tab/><text:tab/><text:tab/><text:tab/><text:tab/> <text:s text:c="3"/></text:span><text:span text:style-name="T7">firewall</text:span></text:p>
      <text:p text:style-name="P1"><text:span text:style-name="T11">11. <text:s/>Typical for SOHO applications, a </text:span><text:span text:style-name="T12">screening router</text:span><text:span text:style-name="T11"> is a single router between internal and external networks with stateless or full packet filtering.</text:span></text:p>
      <text:p text:style-name="P1"><text:span text:style-name="T11"><text:tab/><text:tab/></text:span><text:span text:style-name="T7">A. <text:s/>single bastion T</text:span><text:span text:style-name="T11"><text:tab/><text:tab/><text:tab/></text:span><text:span text:style-name="T7">B. <text:s/>double bastion inline</text:span></text:p>
      <text:p text:style-name="P1"><text:span text:style-name="T11"><text:tab/><text:tab/></text:span><text:span text:style-name="T13">C. <text:s/>screening router</text:span><text:span text:style-name="T11"><text:tab/><text:tab/><text:tab/></text:span><text:span text:style-name="T7">D. <text:s/>host-resident</text:span><text:span text:style-name="T11"> <text:tab/><text:tab/><text:tab/><text:tab/><text:tab/><text:tab/><text:tab/><text:tab/><text:tab/> <text:s text:c="3"/></text:span><text:span text:style-name="T7">firewall</text:span></text:p>
      <text:p text:style-name="P1"><text:span text:style-name="T11">12. <text:s/></text:span><text:span text:style-name="T12">Privilege-escalation exploits</text:span><text:span text:style-name="T11"> are attacks that attempt to give ordinary users root access.</text:span></text:p>
      <text:p text:style-name="P2"><text:span text:style-name="T11"><text:tab/><text:tab/></text:span><text:span text:style-name="T13">A. <text:s/>Privilege-escalation</text:span><text:span text:style-name="T11"><text:tab/><text:tab/></text:span><text:span text:style-name="T7">B. <text:s/>Directory</text:span><text:span text:style-name="T11"> <text:tab/><text:tab/><text:tab/><text:tab/> <text:s text:c="3"/></text:span><text:span text:style-name="T13">exploits</text:span><text:span text:style-name="T11"><text:tab/><text:tab/><text:tab/><text:tab/> <text:s text:c="3"/></text:span><text:span text:style-name="T7">transversals</text:span></text:p>
      <text:p text:style-name="P1"><text:span text:style-name="T11"><text:tab/><text:tab/></text:span><text:span text:style-name="T7">C. <text:s/>File system access</text:span><text:span text:style-name="T11"><text:tab/><text:tab/><text:tab/></text:span><text:span text:style-name="T7">D. <text:s/>Modification of system</text:span><text:span text:style-name="T10"> <text:tab/><text:tab/><text:tab/><text:tab/><text:tab/><text:tab/><text:tab/><text:tab/> <text:s text:c="3"/></text:span><text:span text:style-name="T7">resources</text:span></text:p>
      <text:p text:style-name="P1"><text:span text:style-name="T11"/></text:p>
      <text:p text:style-name="P1"><text:span text:style-name="T11"/></text:p>
      <text:p text:style-name="P1"><text:soft-page-break/><text:span text:style-name="T11">13. <text:s/></text:span><text:span text:style-name="T12">Stategul matching</text:span><text:span text:style-name="T11"> scans for attack signatures in the context of a traffic stream rather than individual packets.</text:span></text:p>
      <text:p text:style-name="P1"><text:span text:style-name="T11"><text:tab/><text:tab/></text:span><text:span text:style-name="T7">A. <text:s/>Pattern matching</text:span><text:span text:style-name="T11"><text:tab/><text:tab/><text:tab/></text:span><text:span text:style-name="T7">B. <text:s/>Protocol anomaly</text:span></text:p>
      <text:p text:style-name="P1"><text:span text:style-name="T11"><text:tab/><text:tab/></text:span><text:span text:style-name="T7">C. <text:s/>Traffic anomaly</text:span><text:span text:style-name="T11"><text:tab/><text:tab/><text:tab/></text:span><text:span text:style-name="T13">D. <text:s/>Stateful matching</text:span></text:p>
      <text:p text:style-name="P1"><text:span text:style-name="T11">14. <text:s/></text:span><text:span text:style-name="T12">Protocol anomaly</text:span><text:span text:style-name="T11"> looks for deviation from standards set forth in RFCs.</text:span></text:p>
      <text:p text:style-name="P1"><text:span text:style-name="T11"><text:tab/><text:tab/></text:span><text:span text:style-name="T7">A. <text:s/>Statistical anomaly</text:span><text:span text:style-name="T11"><text:tab/><text:tab/><text:tab/></text:span><text:span text:style-name="T13">B. <text:s/>Protocol anomaly</text:span></text:p>
      <text:p text:style-name="P1"><text:span text:style-name="T11"><text:tab/><text:tab/></text:span><text:span text:style-name="T7">C. <text:s/>Pattern matching</text:span><text:span text:style-name="T11"><text:tab/><text:tab/><text:tab/></text:span><text:span text:style-name="T7">D. <text:s/>Traffic anomaly</text:span></text:p>
      <text:p text:style-name="P1"><text:span text:style-name="T11">15. <text:s/>The </text:span><text:span text:style-name="T12">tiny fingerprint</text:span><text:span text:style-name="T11"> attack is designed to circumvent filtering rules that depend on TCP header information.</text:span></text:p>
      <text:p text:style-name="P1"><text:span text:style-name="T11"><text:tab/><text:tab/></text:span><text:span text:style-name="T13">A. <text:s/>tiny fragment</text:span><text:span text:style-name="T11"><text:tab/><text:tab/><text:tab/><text:tab/></text:span><text:span text:style-name="T7">B. <text:s/>address spoofing</text:span></text:p>
      <text:p text:style-name="P1"><text:span text:style-name="T11"><text:tab/><text:tab/></text:span><text:span text:style-name="T7">C. <text:s/>source routing</text:span><text:span text:style-name="T11"><text:tab/><text:tab/><text:tab/></text:span><text:span text:style-name="T7">D. <text:s/>bastion host</text:span><text:span text:style-name="T9">lib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Fira Mono for Powerline" svg:font-family="'Fira Mono for Powerline'" style:font-family-generic="swiss" style:font-pitch="variable"/>
    <style:font-face style:name="Calibri1" svg:font-family="Calibri" style:font-family-generic="system" style:font-pitch="variable"/>
    <style:font-face style:name="Fira Mono for Powerline1" svg:font-family="'Fira Mono for Powerline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ira Mono for Powerline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ira Mono for Powerline" fo:font-family="'Fira Mono for Powerline'" style:font-family-generic="swiss" style:font-pitch="variable" fo:font-size="14pt" style:font-name-asian="Fira Mono for Powerline1" style:font-family-asian="'Fira Mono for Powerlin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" fo:font-family="Times" style:font-family-generic="roman" style:font-pitch="variable" fo:font-style="normal" fo:font-weight="bold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00%"/>
      <style:text-properties style:font-name="Inconsolata for Powerline" officeooo:rsid="0002cea1" officeooo:paragraph-rsid="0002cea1"/>
    </style:style>
    <style:style style:name="MP2" style:family="paragraph" style:parent-style-name="Footer">
      <style:text-properties style:font-name="Inconsolata for Powerlin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awrence L. O’Boyle II<text:tab/><text:tab/>12/02/2018</text:p>
      </style:header>
      <style:footer>
        <text:p text:style-name="MP2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4</meta:editing-cycles>
    <meta:creation-date>2018-01-11T17:26:00</meta:creation-date>
    <dc:date>2018-02-12T19:14:10.673952681</dc:date>
    <meta:editing-duration>PT57M46S</meta:editing-duration>
    <meta:generator>LibreOffice/6.0.1.1$Linux_X86_64 LibreOffice_project/00m0$Build-1</meta:generator>
    <meta:document-statistic meta:table-count="0" meta:image-count="0" meta:object-count="0" meta:page-count="3" meta:paragraph-count="48" meta:word-count="446" meta:character-count="3102" meta:non-whitespace-character-count="24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