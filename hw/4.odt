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ira Mono for Powerline" svg:font-family="'Fira Mono for Powerline'" style:font-family-generic="swiss" style:font-pitch="variable"/>
    <style:font-face style:name="Calibri1" svg:font-family="Calibri" style:font-family-generic="system" style:font-pitch="variable"/>
    <style:font-face style:name="Fira Mono for Powerline1" svg:font-family="'Fira Mono for Powerline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line-height="100%"/>
      <style:text-properties style:font-name="Inconsolata for Powerline" officeooo:rsid="0002cea1" officeooo:paragraph-rsid="0002cea1"/>
    </style:style>
    <style:style style:name="P2" style:family="paragraph" style:parent-style-name="Footer">
      <style:text-properties style:font-name="Inconsolata for Powerline"/>
    </style:style>
    <style:style style:name="P3" style:family="paragraph" style:parent-style-name="List_20_Paragraph" style:list-style-name="WWNum4">
      <style:paragraph-properties fo:margin-left="0.25in" fo:margin-right="0in" fo:text-indent="-0.25in" style:auto-text-indent="false"/>
      <style:text-properties style:font-name="Inconsolata for Powerline" fo:font-size="12pt" officeooo:paragraph-rsid="000ab854" style:font-size-asian="12pt" style:font-size-complex="12pt"/>
    </style:style>
    <style:style style:name="P4" style:family="paragraph" style:parent-style-name="Standard">
      <style:text-properties style:font-name="Inconsolata for Powerline" fo:font-size="12pt" officeooo:paragraph-rsid="000ab854" style:font-size-asian="12pt" style:font-size-complex="12pt"/>
    </style:style>
    <style:style style:name="P5" style:family="paragraph" style:parent-style-name="Standard">
      <style:paragraph-properties fo:margin-left="0.3in" fo:margin-right="0in" fo:text-indent="-0.3in" style:auto-text-indent="false"/>
      <style:text-properties style:font-name="Inconsolata for Powerline" fo:font-size="12pt" officeooo:paragraph-rsid="000ab854" style:font-size-asian="12pt" style:font-size-complex="12pt"/>
    </style:style>
    <style:style style:name="P6" style:family="paragraph" style:parent-style-name="Standard">
      <style:paragraph-properties fo:margin-left="0.3in" fo:margin-right="0in" fo:text-indent="-0.3in" style:auto-text-indent="false"/>
      <style:text-properties style:font-name="Inconsolata for Powerline" fo:font-size="12pt" officeooo:paragraph-rsid="000acd9f" style:font-size-asian="12pt" style:font-size-complex="12pt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Inconsolata for Powerline" fo:font-size="12pt" officeooo:paragraph-rsid="000ab854" style:font-size-asian="12pt" style:font-size-complex="12pt"/>
    </style:style>
    <style:style style:name="P8" style:family="paragraph" style:master-page-name="Standard">
      <style:paragraph-properties fo:text-align="center" style:justify-single-word="false" style:page-number="auto"/>
      <style:text-properties style:font-name="Inconsolata for Powerline" fo:font-size="14pt" fo:font-weight="bold" officeooo:rsid="000ab854" officeooo:paragraph-rsid="000ab854" style:font-size-asian="14pt" style:font-weight-asian="bold" style:font-size-complex="14pt" style:font-weight-complex="bold"/>
    </style:style>
    <style:style style:name="T1" style:family="text">
      <style:text-properties style:text-line-through-style="solid" style:text-line-through-type="single" style:font-name-complex="Times1" style:font-weight-complex="bold"/>
    </style:style>
    <style:style style:name="T2" style:family="text">
      <style:text-properties style:text-line-through-style="none" style:text-line-through-type="none" style:font-name-complex="Times1" style:font-weight-complex="bold"/>
    </style:style>
    <style:style style:name="T3" style:family="text">
      <style:text-properties style:text-line-through-style="none" style:text-line-through-type="none" fo:font-weight="bold" style:font-weight-asian="bold" style:font-name-complex="Times1" style:font-weight-complex="bold"/>
    </style:style>
    <style:style style:name="T4" style:family="text">
      <style:text-properties style:font-name-complex="Times1" style:font-weight-complex="bold"/>
    </style:style>
    <style:style style:name="T5" style:family="text">
      <style:text-properties officeooo:rsid="000ab854" style:font-name-complex="Times1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Times1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ab854" style:font-weight-asian="bold" style:font-name-complex="Times1" style:font-weight-complex="bold"/>
    </style:style>
    <style:style style:name="T8" style:family="text">
      <style:text-properties fo:font-weight="bold" style:font-weight-asian="bold" style:font-name-complex="Times1" style:font-weight-complex="bold"/>
    </style:style>
    <style:style style:name="T9" style:family="text">
      <style:text-properties officeooo:rsid="000ab854"/>
    </style:style>
    <style:style style:name="T10" style:family="text">
      <style:text-properties fo:font-weight="normal" style:font-weight-asian="normal" style:font-name-complex="Times1" style:font-weight-complex="normal"/>
    </style:style>
    <style:style style:name="T11" style:family="text">
      <style:text-properties officeooo:rsid="000df1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Homewo<text:span text:style-name="T11">r</text:span>k Assignment 4</text:p>
      <text:list xml:id="list1416483369" text:style-name="WWNum4">
        <text:list-item>
          <text:p text:style-name="P3"><text:span text:style-name="T6">Activists</text:span><text:span text:style-name="T4"> are either individuals or members of a larger group of outsider attackers who are motivated by social or political causes.</text:span></text:p>
        </text:list-item>
      </text:list>
      <text:p text:style-name="P7"><text:span text:style-name="T1">A. <text:s/>State-sponsored organizations</text:span><text:span text:style-name="T4"><text:tab/></text:span><text:span text:style-name="T8">B. <text:s/>Activists</text:span></text:p>
      <text:p text:style-name="P7"><text:span text:style-name="T1">C. <text:s/>Cyber criminals</text:span><text:span text:style-name="T4"><text:tab/><text:tab/><text:tab/></text:span><text:span text:style-name="T1">D. <text:s/>Others</text:span></text:p>
      <text:p text:style-name="P5"><text:span text:style-name="T4">2. <text:s/>A </text:span><text:span text:style-name="T6">security intrusion</text:span><text:span text:style-name="T4"> is a security event that constitutes a security incident in which an intruder gains access to a system without having authorization to do so.</text:span></text:p>
      <text:p text:style-name="P4"><text:span text:style-name="T4"><text:tab/><text:tab/></text:span><text:span text:style-name="T1">A. <text:s/>intrusion detection</text:span><text:span text:style-name="T4"><text:tab/><text:tab/><text:tab/></text:span><text:span text:style-name="T1">B. IDS</text:span></text:p>
      <text:p text:style-name="P4"><text:span text:style-name="T4"><text:tab/><text:tab/></text:span><text:span text:style-name="T1">C. <text:s/>criminal enterprise</text:span><text:span text:style-name="T4"><text:tab/><text:tab/><text:tab/></text:span><text:span text:style-name="T8">D. <text:s/>security intrusion</text:span></text:p>
      <text:p text:style-name="P5"><text:span text:style-name="T4">3. <text:s/>A </text:span><text:span text:style-name="T6">host-based IDS</text:span><text:span text:style-name="T4"> monitors the characteristics of a single host and the events occurring within that host for suspicious activity.</text:span></text:p>
      <text:p text:style-name="P4"><text:span text:style-name="T4"><text:tab/><text:tab/></text:span><text:span text:style-name="T8">A. <text:s/>host-based IDS</text:span><text:span text:style-name="T4"><text:tab/><text:tab/><text:tab/></text:span><text:span text:style-name="T1">B. <text:s/>security intrusion</text:span></text:p>
      <text:p text:style-name="P4"><text:span text:style-name="T4"><text:tab/><text:tab/></text:span><text:span text:style-name="T1">C. <text:s/>network-based IDS</text:span><text:span text:style-name="T4"><text:tab/><text:tab/><text:tab/></text:span><text:span text:style-name="T1">D. <text:s/>intrusion detection</text:span></text:p>
      <text:p text:style-name="P5"><text:span text:style-name="T4">4. <text:s/>A </text:span><text:span text:style-name="T6">network-based IDS</text:span><text:span text:style-name="T4"> monitors network traffic for particular network segments or devices and analyzes network, transport, and application protocols to identify suspicious activity.</text:span></text:p>
      <text:p text:style-name="P4"><text:span text:style-name="T4"><text:tab/><text:tab/></text:span><text:span text:style-name="T1">A. <text:s/>host-based IDS</text:span><text:span text:style-name="T4"><text:tab/><text:tab/><text:tab/></text:span><text:span text:style-name="T1">B. <text:s/>security intrusion</text:span></text:p>
      <text:p text:style-name="P4"><text:span text:style-name="T4"><text:tab/><text:tab/></text:span><text:span text:style-name="T8">C. <text:s/>network-based IDS</text:span><text:span text:style-name="T4"><text:tab/><text:tab/><text:tab/></text:span><text:span text:style-name="T1">D. <text:s/>intrusion detection</text:span></text:p>
      <text:p text:style-name="P4"><text:span text:style-name="T4">5. <text:s/>The </text:span><text:span text:style-name="T6">analyzer</text:span><text:span text:style-name="T4"> is responsible for determining if an intrusion has occurred.</text:span></text:p>
      <text:p text:style-name="P4"><text:span text:style-name="T4"><text:tab/><text:tab/></text:span><text:span text:style-name="T8">A. <text:s/>analyzer</text:span><text:span text:style-name="T4"><text:tab/><text:tab/><text:tab/><text:tab/></text:span><text:span text:style-name="T1">B. <text:s/>host</text:span></text:p>
      <text:p text:style-name="P4"><text:span text:style-name="T4"><text:tab/><text:tab/></text:span><text:span text:style-name="T1">C. <text:s/>user interface</text:span><text:span text:style-name="T4"><text:tab/><text:tab/><text:tab/></text:span><text:span text:style-name="T1">D. <text:s/>sensor</text:span></text:p>
      <text:p text:style-name="P5"><text:span text:style-name="T4">6. <text:s/></text:span><text:span text:style-name="T6">Signature detection</text:span><text:span text:style-name="T4"> involves an attempt to define a set of rules or attack patterns that can be used to decide if a given behavior is that of an intruder.</text:span></text:p>
      <text:p text:style-name="P5"><text:span text:style-name="T4"><text:tab/><text:tab/><text:tab/></text:span><text:span text:style-name="T1">A. <text:s/>Profile based detection</text:span><text:span text:style-name="T4"><text:tab/><text:tab/></text:span><text:span text:style-name="T8">B. <text:s/>Signature detection</text:span></text:p>
      <text:p text:style-name="P5"><text:span text:style-name="T2"><text:tab/><text:tab/><text:tab/></text:span><text:span text:style-name="T1">C. <text:s/>Threshold detection</text:span><text:span text:style-name="T4"><text:tab/><text:tab/><text:tab/></text:span><text:span text:style-name="T1">D. <text:s/>Anomaly detection</text:span></text:p>
      <text:p text:style-name="P5"><text:span text:style-name="T4"/></text:p>
      <text:p text:style-name="P5"><text:soft-page-break/><text:span text:style-name="T4">7. <text:s/></text:span><text:span text:style-name="T6">Anomaly detection</text:span><text:span text:style-name="T4"> involves the collection of data relating to the behavior of legitimate users over a period of time.</text:span></text:p>
      <text:p text:style-name="P5"><text:span text:style-name="T4"><text:tab/><text:tab/><text:tab/></text:span><text:span text:style-name="T1">A. <text:s/>Profile based detection</text:span><text:span text:style-name="T4"><text:tab/><text:tab/></text:span><text:span text:style-name="T1">B. <text:s/>Signature detection</text:span></text:p>
      <text:p text:style-name="P5"><text:span text:style-name="T4"><text:tab/><text:tab/><text:tab/></text:span><text:span text:style-name="T1">C. <text:s/>Threshold detection</text:span><text:span text:style-name="T4"><text:tab/><text:tab/><text:tab/></text:span><text:span text:style-name="T8">D. <text:s/>Anomaly detection</text:span></text:p>
      <text:p text:style-name="P5"><text:span text:style-name="T4">8. <text:s/>A(n) </text:span><text:span text:style-name="T7">ap</text:span><text:span text:style-name="T6">prentice</text:span><text:span text:style-name="T4"> is a hacker with minimal technical skill who primarily uses existing attack toolkits.</text:span></text:p>
      <text:p text:style-name="P5"><text:span text:style-name="T4"><text:tab/><text:tab/><text:tab/></text:span><text:span text:style-name="T1">A. <text:s/>Master</text:span><text:span text:style-name="T4"><text:tab/><text:tab/><text:tab/><text:tab/><text:tab/></text:span><text:span text:style-name="T8">B. <text:s/>Apprentice</text:span></text:p>
      <text:p text:style-name="P5"><text:span text:style-name="T4"><text:tab/><text:tab/><text:tab/></text:span><text:span text:style-name="T1">C. <text:s/>Journeyman</text:span><text:span text:style-name="T4"><text:tab/><text:tab/><text:tab/><text:tab/></text:span><text:span text:style-name="T1">D. <text:s/>Activist</text:span></text:p>
      <text:p text:style-name="P5"><text:span text:style-name="T4">9. <text:s/>The </text:span><text:span text:style-name="T6">LAN monitor agent</text:span><text:span text:style-name="T4"> module analyzes LAN traffic and reports the results to the central manager.</text:span></text:p>
      <text:p text:style-name="P5"><text:span text:style-name="T4"><text:tab/><text:tab/><text:tab/></text:span><text:span text:style-name="T8">A. <text:s/>LAN monitor agent</text:span><text:span text:style-name="T4"><text:tab/><text:tab/><text:tab/></text:span><text:span text:style-name="T1">B. <text:s/>host agent</text:span></text:p>
      <text:p text:style-name="P5"><text:span text:style-name="T4"><text:tab/><text:tab/><text:tab/></text:span><text:span text:style-name="T1">C. <text:s/>central manager agent</text:span><text:span text:style-name="T4"><text:tab/><text:tab/></text:span><text:span text:style-name="T1">D. <text:s/>architecture agent</text:span></text:p>
      <text:p text:style-name="P5"><text:span text:style-name="T4">10. <text:s/>The purpose of the </text:span><text:span text:style-name="T6">host agent</text:span><text:span text:style-name="T4"> module is to collect data on security related events on the host and transmit these to the central manager.</text:span></text:p>
      <text:p text:style-name="P5"><text:span text:style-name="T4"><text:tab/><text:tab/><text:tab/></text:span><text:span text:style-name="T1">A. <text:s/>central manager agent</text:span><text:span text:style-name="T4"><text:tab/><text:tab/></text:span><text:span text:style-name="T1">B. <text:s/>LAN monitor agent</text:span></text:p>
      <text:p text:style-name="P5"><text:span text:style-name="T4"><text:tab/><text:tab/><text:tab/></text:span><text:span text:style-name="T8">C. <text:s/>host agent</text:span><text:span text:style-name="T4"><text:tab/><text:tab/><text:tab/><text:tab/></text:span><text:span text:style-name="T1">D. <text:s/>architecture agent</text:span></text:p>
      <text:p text:style-name="P5"><text:span text:style-name="T4">11. <text:s/>A(n) </text:span><text:span text:style-name="T6">inline sensor</text:span><text:span text:style-name="T4"> is inserted into a network segment so that the traffic that it is monitoring must pass through the sensor.</text:span></text:p>
      <text:p text:style-name="P5"><text:span text:style-name="T4"><text:tab/><text:tab/><text:tab/></text:span><text:span text:style-name="T1">A. <text:s/>passive sensor</text:span><text:span text:style-name="T4"><text:tab/><text:tab/><text:tab/></text:span><text:span text:style-name="T1">B. <text:s/>analysis sensor</text:span></text:p>
      <text:p text:style-name="P5"><text:span text:style-name="T4"><text:tab/><text:tab/><text:tab/></text:span><text:span text:style-name="T1">C. <text:s/>LAN sensor</text:span><text:span text:style-name="T4"><text:tab/><text:tab/><text:tab/><text:tab/></text:span><text:span text:style-name="T8">D. <text:s/>inline sensor</text:span></text:p>
      <text:p text:style-name="P5"><text:span text:style-name="T4">12. <text:s/>A(n) </text:span><text:span text:style-name="T6">DDI</text:span><text:span text:style-name="T4"> event is an alert that is generated when the gossip traffic enables a platform to conclude that an attack is under way.</text:span></text:p>
      <text:p text:style-name="P5"><text:span text:style-name="T4"><text:tab/><text:tab/><text:tab/></text:span><text:span text:style-name="T1">A. <text:s/>PEP</text:span><text:span text:style-name="T4"><text:tab/><text:tab/><text:tab/><text:tab/><text:tab/></text:span><text:span text:style-name="T3">B. <text:s/>DDI</text:span></text:p>
      <text:p text:style-name="P5"><text:span text:style-name="T4"><text:tab/><text:tab/><text:tab/></text:span><text:span text:style-name="T1">C. <text:s/>IDEP</text:span><text:span text:style-name="T4"><text:tab/><text:tab/><text:tab/><text:tab/><text:tab/></text:span><text:span text:style-name="T1">D. <text:s/>IDME</text:span></text:p>
      <text:p text:style-name="P5"><text:span text:style-name="T4">13. <text:s/></text:span><text:span text:style-name="T6">RFC 4767</text:span><text:span text:style-name="T4"> is a document that describes the application level protocol for exchanging data between intrusion detection entities.</text:span></text:p>
      <text:p text:style-name="P5"><text:span text:style-name="T4"><text:tab/><text:tab/><text:tab/></text:span><text:span text:style-name="T8">A. <text:s/>RFC 4767</text:span><text:span text:style-name="T4"><text:tab/><text:tab/><text:tab/><text:tab/></text:span><text:span text:style-name="T1">B. <text:s/>RFC 4766</text:span></text:p>
      <text:p text:style-name="P5"><text:span text:style-name="T4"><text:tab/><text:tab/><text:tab/></text:span><text:span text:style-name="T1">C. <text:s/>RFC 4765</text:span><text:span text:style-name="T4"><text:tab/><text:tab/><text:tab/><text:tab/></text:span><text:span text:style-name="T1">D. <text:s/>RFC 4764</text:span></text:p>
      <text:p text:style-name="P5"><text:soft-page-break/><text:span text:style-name="T4">14. <text:s/>The rule </text:span><text:span text:style-name="T6">action</text:span><text:span text:style-name="T4"> tells Snort what to do when it finds a packet that matches the rule criteria.</text:span></text:p>
      <text:p text:style-name="P5"><text:span text:style-name="T4"><text:tab/><text:tab/><text:tab/></text:span><text:span text:style-name="T1">A. <text:s/>protocol</text:span><text:span text:style-name="T4"><text:tab/><text:tab/><text:tab/><text:tab/></text:span><text:span text:style-name="T1">B. <text:s/>direction</text:span></text:p>
      <text:p text:style-name="P5"><text:span text:style-name="T4"><text:tab/><text:tab/><text:tab/></text:span><text:span text:style-name="T8">C. <text:s/>action</text:span><text:span text:style-name="T4"><text:tab/><text:tab/><text:tab/><text:tab/><text:tab/></text:span><text:span text:style-name="T1">D. <text:s/>destination port</text:span></text:p>
      <text:p text:style-name="P5"><text:span text:style-name="T4">15. <text:s/>The </text:span><text:span text:style-name="T6">analyzer</text:span><text:span text:style-name="T4"> is the ID component that analyzes the data collected by the sensor for signs of unauthorized or undesired activity or for events that might be of interest to the security administrator.</text:span></text:p>
      <text:p text:style-name="P6"><text:span text:style-name="T4"><text:tab/><text:tab/><text:tab/></text:span><text:span text:style-name="T1">A. <text:s/>data source</text:span><text:span text:style-name="T4"><text:tab/><text:tab/><text:tab/><text:tab/></text:span><text:span text:style-name="T1">B. <text:s/>sensor</text:span></text:p>
      <text:p text:style-name="P6"><text:span text:style-name="T4"><text:tab/><text:tab/><text:tab/></text:span><text:span text:style-name="T1">C. <text:s/>operator</text:span><text:span text:style-name="T4"><text:tab/><text:tab/><text:tab/><text:tab/></text:span><text:span text:style-name="T8">D. <text:s/>analyz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ira Mono for Powerline" svg:font-family="'Fira Mono for Powerline'" style:font-family-generic="swiss" style:font-pitch="variable"/>
    <style:font-face style:name="Calibri1" svg:font-family="Calibri" style:font-family-generic="system" style:font-pitch="variable"/>
    <style:font-face style:name="Fira Mono for Powerline1" svg:font-family="'Fira Mono for Powerline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ira Mono for Powerline" fo:font-family="'Fira Mono for Powerline'" style:font-family-generic="swiss" style:font-pitch="variable" fo:font-size="14pt" style:font-name-asian="Fira Mono for Powerline1" style:font-family-asian="'Fira Mono for Powerl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" fo:font-family="Times" style:font-family-generic="roman" style:font-pitch="variable" fo:font-style="normal" fo:font-weight="bold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/>
      <style:text-properties style:font-name="Inconsolata for Powerline" officeooo:rsid="0002cea1" officeooo:paragraph-rsid="0002cea1"/>
    </style:style>
    <style:style style:name="MP2" style:family="paragraph" style:parent-style-name="Footer">
      <style:text-properties style:font-name="Inconsolata for Powerline"/>
    </style:style>
    <style:style style:name="MT1" style:family="text">
      <style:text-properties officeooo:rsid="000ab85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awrence L. O’Boyle II<text:tab/><text:tab/>1<text:span text:style-name="MT1">9</text:span>/02/2018</text:p>
      </style:header>
      <style:footer>
        <text:p text:style-name="MP2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9</meta:editing-cycles>
    <meta:creation-date>2018-01-11T17:26:00</meta:creation-date>
    <dc:date>2018-02-19T18:21:20.672097193</dc:date>
    <meta:editing-duration>PT1H18M57S</meta:editing-duration>
    <meta:generator>LibreOffice/6.0.1.1$Linux_X86_64 LibreOffice_project/00m0$Build-1</meta:generator>
    <meta:print-date>2018-02-19T18:18:33.213296625</meta:print-date>
    <meta:document-statistic meta:table-count="0" meta:image-count="0" meta:object-count="0" meta:page-count="3" meta:paragraph-count="48" meta:word-count="511" meta:character-count="3267" meta:non-whitespace-character-count="25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