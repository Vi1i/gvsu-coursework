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Inconsolata for Powerline" svg:font-family="'Inconsolata for Powerline'" style:font-pitch="fixed"/>
    <style:font-face style:name="Fira Mono for Powerline" svg:font-family="'Fira Mono for Powerline'" style:font-family-generic="roman" style:font-pitch="variable"/>
    <style:font-face style:name="Fira Mono for Powerline1" svg:font-family="'Fira Mono for Powerline'" style:font-family-generic="swiss" style:font-pitch="variable"/>
    <style:font-face style:name="Fira Mono for Powerline2" svg:font-family="'Fira Mono for Powerlin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style:font-name="Inconsolata for Powerline" officeooo:rsid="001e2335" officeooo:paragraph-rsid="001e2335"/>
    </style:style>
    <style:style style:name="P2" style:family="paragraph" style:parent-style-name="Standard">
      <style:paragraph-properties fo:text-align="center" style:justify-single-word="false"/>
      <style:text-properties style:font-name="Inconsolata for Powerline" fo:font-size="14pt" fo:font-weight="bold" officeooo:rsid="001e2335"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Inconsolata for Powerline" fo:font-size="12pt" fo:font-weight="bold" officeooo:rsid="001e2335" officeooo:paragraph-rsid="001e2335"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Inconsolata for Powerline" fo:font-size="12pt" fo:font-weight="normal" officeooo:rsid="002384f0" officeooo:paragraph-rsid="002384f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Inconsolata for Powerline" fo:font-size="12pt" fo:font-weight="normal" officeooo:rsid="00272314" officeooo:paragraph-rsid="0027231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Inconsolata for Powerline" fo:font-size="12pt" fo:font-weight="normal" officeooo:rsid="0028de4c" officeooo:paragraph-rsid="0028de4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Inconsolata for Powerline" fo:font-size="12pt" fo:font-weight="normal" officeooo:rsid="002ae45f" officeooo:paragraph-rsid="002ae45f" style:font-size-asian="10.5pt" style:font-weight-asian="normal" style:font-size-complex="12pt" style:font-weight-complex="normal"/>
    </style:style>
    <style:style style:name="T1" style:family="text">
      <style:text-properties officeooo:rsid="002384f0"/>
    </style:style>
    <style:style style:name="T2" style:family="text">
      <style:text-properties officeooo:rsid="00253e8a"/>
    </style:style>
    <style:style style:name="T3" style:family="text">
      <style:text-properties officeooo:rsid="0027f7d2"/>
    </style:style>
    <style:style style:name="T4" style:family="text">
      <style:text-properties officeooo:rsid="002975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YOD Security Implementation for Small Organizations</text:p>
      <text:p text:style-name="P2"/>
      <text:p text:style-name="P3">Abstract</text:p>
      <text:p text:style-name="P4"><text:tab/>BYOD is a quickly growing <text:span text:style-name="T2">policy due to the general public having access to more and more devices. While there are upsides and downsides to these policies, there is much for any information security team to manage. The author covers an implementation of Mobile Device Management(MDM), policies, requirements, enforcement's, current trends and lists some tools for use. In depth, the author covers mobile security practices and requirements between Android and iOS devices.</text:span></text:p>
      <text:p text:style-name="P3">Effectiveness of the Idea or Solution(5-20)</text:p>
      <text:p text:style-name="P5">The solutions presented by the author are very good, though non-open sourced tools can be very costly. While the effectiveness of the solutions are very similar of normal security implementations of a stationary wired device, there are several key differences. With BYOD, good network segregation, ACLs, and DLPs are very crucial to the security. <text:span text:style-name="T4">Regular training for the employees with these devices can help as well.</text:span></text:p>
      <text:p text:style-name="P5"><text:tab/>Having a wireless network itself is concern for security as it now allows an attack surface much larger. So strong techniques to encrypt data between the access point and the device is crucial. The access points will need to be either be <text:span text:style-name="T3">heavily</text:span> locked down with ACLs or <text:span text:style-name="T3">nothing more than a dumb device. While this is not necessarily a BYOD device, it is likely the point of contact for much of them. So network segregation and strong rules on such networks is highly recommended.</text:span></text:p>
      <text:p text:style-name="P5"><text:tab/><text:span text:style-name="T3">Data loss prevention (DLP) is a major concern in BYOD, good encryption of the data storage on the devices in locked or off state is crucial. The devices will need stronger password enforcement, and perhaps two-factor-authentication (TFA). On top of this, tools that can allow you to trace the item if lost, or if the device has not checked into the server in x days to delete the data on next startup.</text:span></text:p>
      <text:p text:style-name="P3">Drawback of the Idea or Solution(5-20)</text:p>
      <text:p text:style-name="P6"><text:tab/>The drawback of the solutions mentioned by the author is firstly allowing BYOD <text:span text:style-name="T4">in the first place. While this can make employees happy and be cheaper on the budget, this is a high attack surface. When we allow BYOD in our organization we need to enter a much higher level of response, detection, and service.</text:span></text:p>
      <text:p text:style-name="P6"><text:tab/><text:span text:style-name="T4">With many an individual having little knowledge of how security works it is hard to have them maintain the correct level of alertness when not at work. Plus, they might not even be the only person utilizing the device at home.</text:span></text:p>
      <text:p text:style-name="P6"><text:tab/><text:span text:style-name="T4">Many of the solutions are expensive to implement on this type of new wireless system, where there are certainly free solutions, they usually do not garner the support, ease-of-use, or enough brevity compared to the paid for systems.</text:span></text:p>
      <text:p text:style-name="P3">Conclusion(3-10)</text:p>
      <text:p text:style-name="P7"><text:tab/>While the other staff see it as a boon, and easier transitions, BYOD is a security teams nightmare, from implementation to cost. And while a security will very rarely be able to enforce a no BYOD policy in an organization, we need to be prepared and ready for the cluster that such policies entail. The authors solutions are strong and well thought out, the issue is that they are built in quicksand that BYOD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Inconsolata for Powerline" svg:font-family="'Inconsolata for Powerline'" style:font-pitch="fixed"/>
    <style:font-face style:name="Fira Mono for Powerline" svg:font-family="'Fira Mono for Powerline'" style:font-family-generic="roman" style:font-pitch="variable"/>
    <style:font-face style:name="Fira Mono for Powerline1" svg:font-family="'Fira Mono for Powerline'" style:font-family-generic="swiss" style:font-pitch="variable"/>
    <style:font-face style:name="Fira Mono for Powerline2" svg:font-family="'Fira Mono for Powerlin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Fira Mono for Powerline" fo:font-size="12pt" fo:language="en" fo:country="US" style:letter-kerning="true" style:font-name-asian="Fira Mono for Powerline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Fira Mono for Powerline" fo:font-size="12pt" fo:language="en" fo:country="US" style:letter-kerning="true" style:font-name-asian="Fira Mono for Powerline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Fira Mono for Powerline1" fo:font-family="'Fira Mono for Powerline'" style:font-family-generic="swiss" style:font-pitch="variable" fo:font-size="14pt" style:font-name-asian="Fira Mono for Powerline2" style:font-family-asian="'Fira Mono for Powerlin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Inconsolata for Powerline" officeooo:rsid="001e2335" officeooo:paragraph-rsid="001e2335"/>
    </style:style>
    <style:style style:name="MT1" style:family="text">
      <style:text-properties officeooo:rsid="002384f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wrence L. O’Boyle II<text:tab/><text:tab/><text:span text:style-name="MT1">26</text:span>/02/2018</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3:05:21.340401935</meta:creation-date>
    <dc:date>2018-02-26T19:05:08.065360087</dc:date>
    <meta:editing-duration>PT1H57M22S</meta:editing-duration>
    <meta:editing-cycles>3</meta:editing-cycles>
    <meta:generator>LibreOffice/6.0.1.1$Linux_X86_64 LibreOffice_project/00m0$Build-1</meta:generator>
    <meta:print-date>2018-02-26T18:04:11.886651692</meta:print-date>
    <meta:document-statistic meta:table-count="0" meta:image-count="0" meta:object-count="0" meta:page-count="1" meta:paragraph-count="15" meta:word-count="530" meta:character-count="3151" meta:non-whitespace-character-count="2626"/>
  </office:meta>
</office:document-meta>
</file>