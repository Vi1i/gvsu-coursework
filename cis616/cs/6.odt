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Inconsolata for Powerline" svg:font-family="'Inconsolata for Powerline'"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Inconsolata for Powerline" fo:font-size="12pt" fo:font-weight="normal" officeooo:rsid="002ae45f" officeooo:paragraph-rsid="00151188"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Inconsolata for Powerline" fo:font-size="12pt" fo:font-weight="normal" officeooo:rsid="002384f0" officeooo:paragraph-rsid="0015118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Inconsolata for Powerline" fo:font-size="12pt" fo:font-weight="normal" officeooo:rsid="0016804d" officeooo:paragraph-rsid="0016804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Inconsolata for Powerline" fo:font-size="12pt" fo:font-weight="normal" officeooo:rsid="001834a1" officeooo:paragraph-rsid="001834a1"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Inconsolata for Powerline" fo:font-size="12pt" fo:font-weight="bold" officeooo:rsid="001e2335" officeooo:paragraph-rsid="00151188"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Inconsolata for Powerline" fo:font-size="14pt" fo:font-weight="bold" officeooo:rsid="001e2335" officeooo:paragraph-rsid="00151188" style:font-size-asian="14pt" style:font-weight-asian="bold" style:font-size-complex="14pt" style:font-weight-complex="bold"/>
    </style:style>
    <style:style style:name="P7" style:family="paragraph" style:parent-style-name="Header">
      <style:text-properties style:font-name="Inconsolata for Powerline" officeooo:rsid="00151188" officeooo:paragraph-rsid="00151188"/>
    </style:style>
    <style:style style:name="T1" style:family="text">
      <style:text-properties officeooo:rsid="00151188"/>
    </style:style>
    <style:style style:name="T2" style:family="text">
      <style:text-properties officeooo:rsid="001834a1"/>
    </style:style>
    <style:style style:name="T3" style:family="text">
      <style:text-properties officeooo:rsid="001996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State of Honeypots: Understanding the Use of Honey Technologies Today</text:p>
      <text:p text:style-name="P6"/>
      <text:p text:style-name="P5">Abstract</text:p>
      <text:p text:style-name="P2"><text:tab/><text:span text:style-name="T1">This paper covers a study that the authors have done on honeypots in real-world industry. This study covered three types of honey techniques, honeypots, honeytokens, and honeynets. The authors collected the data via surveys distributed to information security professionals in industry, and covers this data. The data presented is analyzed for insights and lessons. This paper also holds a copy of the questions sent to the individuals, but not the answers.</text:span></text:p>
      <text:p text:style-name="P5">Effectiveness of the Idea or Solution</text:p>
      <text:p text:style-name="P3"><text:tab/>The questions asked were quite laid out. The surveyed respondents were asked questions about <text:span text:style-name="T2">about the familiarity with the three main topics: honeypots, honeynets, and honeynets. They were asked from the amount of triggered events from each topic to amount implemented. The questions were wide on the topics and categorized based on the industry it came from. The hypothesis asked was straight forward and answered succinctly.</text:span></text:p>
      <text:p text:style-name="P5">Drawback of the Idea or Solution</text:p>
      <text:p text:style-name="P4"><text:tab/>While this survey <text:span text:style-name="T3">covered</text:span> <text:span text:style-name="T3">the hypothesis well, the questions relied that the industry people implemented the topics. Looking at the results, many of the professionals knew what honey technologies were, but when asked about current set ups, most skipped, while the others that answered were mostly no.</text:span></text:p>
      <text:p text:style-name="P5">Conclusion</text:p>
      <text:p text:style-name="P1"><text:tab/><text:span text:style-name="T3">From the survey results, we saw that the authors hypothesis that honey technologies are not widely deployed in the productions was true and supported by the survey results. Looking at the results section to the questions, it could be said that while many people have the knowledge of honey technologies, there is something that is stopping many from implementations in a production enviro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Inconsolata for Powerline" svg:font-family="'Inconsolata for Powerline'"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Inconsolata for Powerline" officeooo:rsid="00151188" officeooo:paragraph-rsid="0015118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Lawrence L. O’Boyle II<text:tab/><text:tab/>12/03/2018</text:p>
      </style:header>
      <style:footer>
        <text:p text:style-name="Footer"><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5:27:55.995499238</meta:creation-date>
    <dc:date>2018-03-12T16:12:51.963357254</dc:date>
    <meta:editing-duration>PT24M36S</meta:editing-duration>
    <meta:editing-cycles>2</meta:editing-cycles>
    <meta:generator>LibreOffice/6.0.2.1.0$Linux_X86_64 LibreOffice_project/00m0$Build-1</meta:generator>
    <meta:document-statistic meta:table-count="0" meta:image-count="0" meta:object-count="0" meta:page-count="1" meta:paragraph-count="11" meta:word-count="278" meta:character-count="1781" meta:non-whitespace-character-count="1507"/>
  </office:meta>
</office:document-meta>
</file>