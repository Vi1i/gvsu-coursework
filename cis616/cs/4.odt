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for Powerline" svg:font-family="'Inconsolata for Powerline'" style:font-pitch="fixed"/>
    <style:font-face style:name="Fira Mono for Powerline" svg:font-family="'Fira Mono for Powerline'" style:font-family-generic="roman" style:font-pitch="variable"/>
    <style:font-face style:name="Fira Mono for Powerline1" svg:font-family="'Fira Mono for Powerline'" style:font-family-generic="swiss" style:font-pitch="variable"/>
    <style:font-face style:name="Fira Mono for Powerline2" svg:font-family="'Fira Mono for Powerlin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Inconsolata for Powerline" fo:font-size="14pt" fo:font-weight="bold" officeooo:rsid="001e233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consolata for Powerline" fo:font-size="11pt" fo:font-weight="bold" officeooo:rsid="001e2335" officeooo:paragraph-rsid="001e2335"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Inconsolata for Powerline" fo:font-size="11pt" fo:font-weight="normal" officeooo:rsid="00262cc8" officeooo:paragraph-rsid="00262cc8"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Inconsolata for Powerline" fo:font-size="11pt" fo:font-weight="normal" officeooo:rsid="00275330" officeooo:paragraph-rsid="00275330"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Inconsolata for Powerline" fo:font-size="11pt" fo:font-weight="normal" officeooo:rsid="00285560" officeooo:paragraph-rsid="00285560"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text-line-through-style="none" style:text-line-through-type="none" style:font-name="Inconsolata for Powerline" fo:font-size="11pt" fo:font-weight="normal" officeooo:rsid="00285560" officeooo:paragraph-rsid="00285560" style:font-size-asian="11pt" style:font-weight-asian="normal" style:font-size-complex="11pt" style:font-weight-complex="normal"/>
    </style:style>
    <style:style style:name="P7" style:family="paragraph" style:parent-style-name="Header">
      <style:text-properties style:font-name="Inconsolata for Powerline" officeooo:rsid="001e2335" officeooo:paragraph-rsid="001e2335"/>
    </style:style>
    <style:style style:name="P8" style:family="paragraph" style:parent-style-name="Header">
      <style:text-properties style:font-name="Inconsolata for Powerline" officeooo:rsid="0029c193" officeooo:paragraph-rsid="0029c193"/>
    </style:style>
    <style:style style:name="T1" style:family="text">
      <style:text-properties officeooo:rsid="002855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 Study: Critical Controls that Could Have Prevented Target Breach</text:p>
      <text:p text:style-name="P1"/>
      <text:p text:style-name="P2">Abstract</text:p>
      <text:p text:style-name="P3">The author writes about the in-sufficient means that Target took that lead to the loss of point of sale(PoS) data. The author then talks about the general strategy of maintaining this data in a secure way. After which, these strategies are then applied to the Target case study. With this new strategy, the author speculates the new, better outcome based on the strategies talked about. Much of this is broken down into the CRCs that were discussed, and applying them to the situation in a hypothetical model.</text:p>
      <text:p text:style-name="P2">Effectiveness of the Idea or Solution</text:p>
      <text:p text:style-name="P4">The effectiveness of the CRCs are high. Risked-based approach could have found the vulnerabilities that were exploited. Setting up threat models for the system could have provide insight to the pivots that were used on the system. Better logging and monitoring would have greatly decreased the exploit life. Risk-Reward assessment could have lead to a better understanding of which systems had higher priority. With a threat model, they could have had better security in place for the risks they found.</text:p>
      <text:p text:style-name="P2">Drawback of the Idea or Solution</text:p>
      <text:p text:style-name="P4">While the <text:span text:style-name="T1">CRCs talked about are very good, implementation of them would require a <text:s/>massive roll-out and expense. While this is something that is much easier to decide on with a new system, the conversion from the older system is likely to have been massive.</text:span></text:p>
      <text:p text:style-name="P5">While the tools they could have used could certainly have helped, we can’t totally rely on them to be exploit free. Many of these tools have a work-around that they can still get around with.</text:p>
      <text:p text:style-name="P5">Depending on the time they hackers took, the data was relatively small, and could have been leaked out in other means. Encryption on other packets heading out of the system could be one way.</text:p>
      <text:p text:style-name="P2">Conclusion</text:p>
      <text:p text:style-name="P6">Much of the attack surface that was found, should not have been there. This could have been very easily detected with a team of penetration testers testing and looking for ways in. Without the attack surface with the vendors it is likely that hackers wouldn’t of found the low hanging fruit inside. Once inside, various common methods could have been used to secure the system down that would likely have not been a heavy burden on the IT teams involved.</text:p>
      <text:p text:style-name="P6">The CRCs are great, as usual, but getting them into an old regimented system can be hard, especially if it needs to be done quickly because most organizations care more about money made than the small damage such an exploit can have on the profits. Convincing the management that a system needs to be upgrades could be h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for Powerline" svg:font-family="'Inconsolata for Powerline'" style:font-pitch="fixed"/>
    <style:font-face style:name="Fira Mono for Powerline" svg:font-family="'Fira Mono for Powerline'" style:font-family-generic="roman" style:font-pitch="variable"/>
    <style:font-face style:name="Fira Mono for Powerline1" svg:font-family="'Fira Mono for Powerline'" style:font-family-generic="swiss" style:font-pitch="variable"/>
    <style:font-face style:name="Fira Mono for Powerline2" svg:font-family="'Fira Mono for Powerlin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Mono for Powerline" fo:font-size="12pt" fo:language="en" fo:country="US" style:letter-kerning="true" style:font-name-asian="Fira Mono for Powerline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ira Mono for Powerline" fo:font-size="12pt" fo:language="en" fo:country="US" style:letter-kerning="true" style:font-name-asian="Fira Mono for Powerline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ira Mono for Powerline1" fo:font-family="'Fira Mono for Powerline'" style:font-family-generic="swiss" style:font-pitch="variable" fo:font-size="14pt" style:font-name-asian="Fira Mono for Powerline2" style:font-family-asian="'Fira Mono for Powerlin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Inconsolata for Powerline" officeooo:rsid="001e2335" officeooo:paragraph-rsid="001e2335"/>
    </style:style>
    <style:style style:name="MP2" style:family="paragraph" style:parent-style-name="Header">
      <style:text-properties style:font-name="Inconsolata for Powerline" officeooo:rsid="0029c193" officeooo:paragraph-rsid="0029c1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wrence L. O’Boyle II<text:tab/><text:tab/>19/02/2018</text:p>
        <text:p text:style-name="MP2">Case Study</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05:21.340401935</meta:creation-date>
    <dc:date>2018-02-19T20:05:36.626430895</dc:date>
    <meta:editing-duration>PT1H23M5S</meta:editing-duration>
    <meta:editing-cycles>5</meta:editing-cycles>
    <meta:generator>LibreOffice/6.0.1.1$Linux_X86_64 LibreOffice_project/00m0$Build-1</meta:generator>
    <meta:print-date>2018-02-19T20:04:08.087643310</meta:print-date>
    <meta:document-statistic meta:table-count="0" meta:image-count="0" meta:object-count="0" meta:page-count="1" meta:paragraph-count="15" meta:word-count="451" meta:character-count="2630" meta:non-whitespace-character-count="2190"/>
  </office:meta>
</office:document-meta>
</file>