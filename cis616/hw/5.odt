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26in" fo:margin-left="0in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2549in"/>
    </style:style>
    <style:style style:name="Table1.B" style:family="table-column">
      <style:table-column-properties style:column-width="6.6778in"/>
    </style:style>
    <style:style style:name="Table1.1" style:family="table-row">
      <style:table-row-properties style:min-row-height="0.8104in" fo:keep-together="always"/>
    </style:style>
    <style:style style:name="Table1.A1" style:family="table-cell">
      <style:table-cell-properties fo:background-color="transparent" fo:padding="0.0382in" fo:border-left="none" fo:border-right="0.5pt solid #000000" fo:border-top="none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05pt dashed #000000" fo:border-right="none" fo:border-top="0.05pt dashed #000000" fo:border-bottom="0.05pt dashed #000000" style:writing-mode="page">
        <style:background-image/>
      </style:table-cell-properties>
    </style:style>
    <style:style style:name="Table1.2" style:family="table-row">
      <style:table-row-properties fo:keep-together="always"/>
    </style:style>
    <style:style style:name="Table1.B2" style:family="table-cell">
      <style:table-cell-properties fo:background-color="transparent" fo:padding="0.0382in" fo:border-left="0.05pt dashed #000000" fo:border-right="none" fo:border-top="none" fo:border-bottom="0.05pt dashed #000000" style:writing-mode="page">
        <style:background-image/>
      </style:table-cell-properties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7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19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21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3" style:family="table-row">
      <style:table-row-properties fo:keep-together="always"/>
    </style:style>
    <style:style style:name="Table1.24" style:family="table-row">
      <style:table-row-properties fo:keep-together="always"/>
    </style:style>
    <style:style style:name="Table1.25" style:family="table-row">
      <style:table-row-properties fo:keep-together="always"/>
    </style:style>
    <style:style style:name="Table1.26" style:family="table-row">
      <style:table-row-properties fo:keep-together="always"/>
    </style:style>
    <style:style style:name="Table1.27" style:family="table-row">
      <style:table-row-properties fo:keep-together="always"/>
    </style:style>
    <style:style style:name="Table1.28" style:family="table-row">
      <style:table-row-properties fo:keep-together="always"/>
    </style:style>
    <style:style style:name="Table1.29" style:family="table-row">
      <style:table-row-properties fo:keep-together="always"/>
    </style:style>
    <style:style style:name="Table1.30" style:family="table-row">
      <style:table-row-properties fo:keep-together="always"/>
    </style:style>
    <style:style style:name="Table1.A30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Header">
      <style:text-properties style:font-name="Inconsolata for Powerline" officeooo:rsid="001609fb" officeooo:paragraph-rsid="001609fb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f9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rsid="00086f17" officeooo:paragraph-rsid="00086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rsid="0013dc94" officeooo:paragraph-rsid="0013dc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List_20_Paragraph" style:list-style-name="WWNum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114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List_20_Paragraph" style:list-style-name="WWNum1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9e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List_20_Paragraph" style:list-style-name="WWNum1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bb2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List_20_Paragraph" style:list-style-name="WWNum1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c5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List_20_Paragraph" style:list-style-name="WWNum1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dc1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List_20_Paragraph" style:list-style-name="WWNum1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e3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List_20_Paragraph" style:list-style-name="WWNum1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114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List_20_Paragraph" style:list-style-name="WWNum1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12a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List_20_Paragraph" style:list-style-name="WWNum1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13dc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86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9e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bb2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List_20_Paragraph" style:list-style-name="WWNum2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9e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c5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dc1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e3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List_20_Paragraph" style:list-style-name="WWNum4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0f9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12a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paragraph-rsid="0013dc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rsid="000bb226" officeooo:paragraph-rsid="000bb2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Inconsolata for Powerline" fo:font-size="12pt" fo:font-style="normal" fo:text-shadow="none" style:text-underline-style="none" fo:font-weight="normal" officeooo:rsid="000dc17b" officeooo:paragraph-rsid="000dc1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List_20_Paragraph" style:list-style-name="WWNum1">
      <style:paragraph-properties fo:margin-left="0in" fo:margin-right="0in" fo:line-height="100%" fo:text-indent="0in" style:auto-text-indent="false"/>
      <style:text-properties style:font-name="Inconsolata for Powerline" officeooo:rsid="00086f17" officeooo:paragraph-rsid="00086f17"/>
    </style:style>
    <style:style style:name="P27" style:family="paragraph" style:parent-style-name="Text_20_body">
      <style:paragraph-properties fo:text-align="center" style:justify-single-word="false" fo:break-before="auto" fo:break-after="auto"/>
      <style:text-properties style:font-name="Inconsolata for Powerline" officeooo:rsid="001609fb" officeooo:paragraph-rsid="001609fb"/>
    </style:style>
    <style:style style:name="T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86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14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9e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086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1142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officeooo:rsid="00086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officeooo:rsid="001142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solid" style:text-line-through-type="sing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solid" style:text-line-through-type="single" fo:font-size="12pt" fo:font-style="normal" fo:text-shadow="none" style:text-underline-style="none" fo:font-weight="normal" officeooo:rsid="00086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solid" style:text-line-through-type="single" fo:font-size="12pt" fo:font-style="normal" fo:text-shadow="none" style:text-underline-style="none" fo:font-weight="normal" officeooo:rsid="00114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solid" style:text-line-through-type="single" fo:font-size="12pt" fo:font-style="normal" fo:text-shadow="none" style:text-underline-style="none" fo:font-weight="normal" officeooo:rsid="0009e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solid" style:text-line-through-type="single" fo:font-size="12pt" fo:font-style="normal" fo:text-shadow="none" style:text-underline-style="none" fo:font-weight="normal" officeooo:rsid="000dc1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style:text-line-through-style="solid" style:text-line-through-type="single" officeooo:rsid="0009eb1f"/>
    </style:style>
    <style:style style:name="T18" style:family="text">
      <style:text-properties style:text-line-through-style="solid" style:text-line-through-type="single" officeooo:rsid="000bb226"/>
    </style:style>
    <style:style style:name="T19" style:family="text">
      <style:text-properties style:text-line-through-style="solid" style:text-line-through-type="single" officeooo:rsid="000c507d"/>
    </style:style>
    <style:style style:name="T20" style:family="text">
      <style:text-properties style:text-line-through-style="solid" style:text-line-through-type="single" officeooo:rsid="000dc17b"/>
    </style:style>
    <style:style style:name="T21" style:family="text">
      <style:text-properties style:text-line-through-style="solid" style:text-line-through-type="single" officeooo:rsid="000e3c3a"/>
    </style:style>
    <style:style style:name="T22" style:family="text">
      <style:text-properties style:text-line-through-style="solid" style:text-line-through-type="single" officeooo:rsid="000f983d"/>
    </style:style>
    <style:style style:name="T23" style:family="text">
      <style:text-properties style:text-line-through-style="solid" style:text-line-through-type="single" officeooo:rsid="001142a6"/>
    </style:style>
    <style:style style:name="T24" style:family="text">
      <style:text-properties style:text-line-through-style="solid" style:text-line-through-type="single" officeooo:rsid="0012a23b"/>
    </style:style>
    <style:style style:name="T25" style:family="text">
      <style:text-properties style:text-line-through-style="solid" style:text-line-through-type="single" officeooo:rsid="0013dc94"/>
    </style:style>
    <style:style style:name="T26" style:family="text">
      <style:text-properties style:text-line-through-style="solid" style:text-line-through-type="single" officeooo:rsid="001609fb"/>
    </style:style>
    <style:style style:name="T27" style:family="text">
      <style:text-properties style:text-line-through-style="solid" style:text-line-through-type="single" officeooo:rsid="00145a6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9eb1f" style:font-weight-asian="bold" style:font-weight-complex="bold"/>
    </style:style>
    <style:style style:name="T30" style:family="text">
      <style:text-properties fo:font-weight="bold" officeooo:rsid="000c507d" style:font-weight-asian="bold" style:font-weight-complex="bold"/>
    </style:style>
    <style:style style:name="T31" style:family="text">
      <style:text-properties fo:font-weight="bold" officeooo:rsid="000dc17b" style:font-weight-asian="bold" style:font-weight-complex="bold"/>
    </style:style>
    <style:style style:name="T32" style:family="text">
      <style:text-properties fo:font-weight="bold" officeooo:rsid="000e3c3a" style:font-weight-asian="bold" style:font-weight-complex="bold"/>
    </style:style>
    <style:style style:name="T33" style:family="text">
      <style:text-properties fo:font-weight="bold" officeooo:rsid="000f983d" style:font-weight-asian="bold" style:font-weight-complex="bold"/>
    </style:style>
    <style:style style:name="T34" style:family="text">
      <style:text-properties fo:font-weight="bold" officeooo:rsid="001142a6" style:font-weight-asian="bold" style:font-weight-complex="bold"/>
    </style:style>
    <style:style style:name="T35" style:family="text">
      <style:text-properties fo:font-weight="bold" officeooo:rsid="0012a23b" style:font-weight-asian="bold" style:font-weight-complex="bold"/>
    </style:style>
    <style:style style:name="T36" style:family="text">
      <style:text-properties fo:font-weight="bold" officeooo:rsid="0013dc94" style:font-weight-asian="bold" style:font-weight-complex="bold"/>
    </style:style>
    <style:style style:name="T37" style:family="text">
      <style:text-properties fo:font-weight="bold" officeooo:rsid="00145a68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0bb226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0c507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0dc17b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0e3c3a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0f983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1142a6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12a23b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13dc94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1609fb" style:font-weight-asian="bold" style:font-weight-complex="bold"/>
    </style:style>
    <style:style style:name="T48" style:family="text">
      <style:text-properties officeooo:rsid="0009eb1f"/>
    </style:style>
    <style:style style:name="T49" style:family="text">
      <style:text-properties officeooo:rsid="000c507d"/>
    </style:style>
    <style:style style:name="T50" style:family="text">
      <style:text-properties officeooo:rsid="000dc17b"/>
    </style:style>
    <style:style style:name="T51" style:family="text">
      <style:text-properties officeooo:rsid="000e3c3a"/>
    </style:style>
    <style:style style:name="T52" style:family="text">
      <style:text-properties officeooo:rsid="000f983d"/>
    </style:style>
    <style:style style:name="T53" style:family="text">
      <style:text-properties officeooo:rsid="001142a6"/>
    </style:style>
    <style:style style:name="T54" style:family="text">
      <style:text-properties officeooo:rsid="0012a23b"/>
    </style:style>
    <style:style style:name="T55" style:family="text">
      <style:text-properties officeooo:rsid="0013dc94"/>
    </style:style>
    <style:style style:name="T56" style:family="text">
      <style:text-properties officeooo:rsid="00145a68"/>
    </style:style>
    <style:style style:name="T57" style:family="text">
      <style:text-properties officeooo:rsid="001609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Homework Assignment 5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01</text:p>
          </table:table-cell>
          <table:table-cell table:style-name="Table1.B1" office:value-type="string">
            <text:list xml:id="list37573425" text:style-name="WWNum1">
              <text:list-header>
                <text:p text:style-name="P6"><text:span text:style-name="T1">The buffer overflow type of attack has been known since it was first widely used by the </text:span><text:span text:style-name="T9">Morris Internet</text:span><text:span text:style-name="T1"> Worm in 1988.</text:span></text:p>
              </text:list-header>
            </text:list>
            <text:p text:style-name="P14"><text:tab/><text:span text:style-name="T16">A. <text:s/>Code Red</text:span><text:tab/><text:tab/><text:tab/><text:tab/><text:span text:style-name="T16">B. <text:s/>Slammer</text:span></text:p>
            <text:p text:style-name="P14"><text:span text:style-name="T6"><text:tab/>C. <text:s/>Morris Internet</text:span><text:span text:style-name="T2"><text:tab/><text:tab/><text:tab/></text:span><text:span text:style-name="T12">D. <text:s/>Alpha One</text:span></text:p>
          </table:table-cell>
        </table:table-row>
        <table:table-row table:style-name="Table1.2">
          <table:table-cell table:style-name="Table1.A1" office:value-type="string">
            <text:p text:style-name="P3">02</text:p>
          </table:table-cell>
          <table:table-cell table:style-name="Table1.B2" office:value-type="string">
            <text:list xml:id="list144957340639967" text:continue-numbering="true" text:style-name="WWNum1">
              <text:list-header>
                <text:p text:style-name="P6"><text:span text:style-name="T1">A buffer </text:span><text:span text:style-name="T8">overflow</text:span><text:span text:style-name="T1"> is a condition at an interface under which more input can be placed into a buffer or data holding area than the capacity allocated, overwriting other information.</text:span></text:p>
              </text:list-header>
            </text:list>
            <text:p text:style-name="P15"><text:span text:style-name="T28"><text:tab/>A. overflow</text:span><text:tab/><text:tab/><text:tab/><text:tab/><text:tab/><text:span text:style-name="T16">B. <text:s/>overrun</text:span></text:p>
            <text:p text:style-name="P15"><text:span text:style-name="T1"><text:tab/></text:span><text:span text:style-name="T11">C. overwrite</text:span><text:span text:style-name="T1"><text:tab/><text:tab/><text:tab/><text:tab/></text:span><text:span text:style-name="T11">D. <text:s/>all the above</text:span></text:p>
          </table:table-cell>
        </table:table-row>
        <table:table-row table:style-name="Table1.3">
          <table:table-cell table:style-name="Table1.A1" office:value-type="string">
            <text:p text:style-name="P3">03</text:p>
          </table:table-cell>
          <table:table-cell table:style-name="Table1.B2" office:value-type="string">
            <text:list xml:id="list144957033313635" text:continue-numbering="true" text:style-name="WWNum1">
              <text:list-header>
                <text:p text:style-name="P7">A consequence of a buffer overflow error is <text:span text:style-name="T38">all the above</text:span>.</text:p>
              </text:list-header>
            </text:list>
            <text:p text:style-name="P16"><text:span text:style-name="T4"><text:tab/></text:span><text:span text:style-name="T14">A. </text:span><text:span text:style-name="T11">corruption of data used </text:span><text:span text:style-name="T15">by the</text:span><text:span text:style-name="T1"><text:tab/></text:span><text:span text:style-name="T14">B. </text:span><text:span text:style-name="T11">unexpected transfer of </text:span><text:span text:style-name="T15">control</text:span></text:p>
            <text:p text:style-name="P16"><text:span text:style-name="T1"><text:tab/> <text:s text:c="2"/></text:span><text:span text:style-name="T11">program</text:span><text:span text:style-name="T1"><text:tab/><text:tab/><text:tab/> <text:s/><text:tab/> <text:s/><text:tab/> <text:s text:c="2"/></text:span><text:span text:style-name="T11">in the program</text:span></text:p>
            <text:list xml:id="list1461167398" text:style-name="WWNum2">
              <text:list-header>
                <text:p text:style-name="P17"><text:span text:style-name="T48"><text:tab/></text:span><text:span text:style-name="T17">C. </text:span><text:span text:style-name="T16">possible memory access</text:span><text:tab/><text:tab/><text:span text:style-name="T29">D. </text:span><text:span text:style-name="T28">all the above</text:span></text:p>
              </text:list-header>
            </text:list>
            <text:p text:style-name="P16"><text:tab/> <text:s text:c="2"/><text:span text:style-name="T16">violation</text:span></text:p>
          </table:table-cell>
        </table:table-row>
        <table:table-row table:style-name="Table1.4">
          <table:table-cell table:style-name="Table1.A1" office:value-type="string">
            <text:p text:style-name="P3">04</text:p>
          </table:table-cell>
          <table:table-cell table:style-name="Table1.B2" office:value-type="string">
            <text:list xml:id="list144956000918281" text:continue-list="list144957033313635" text:style-name="WWNum1">
              <text:list-header>
                <text:p text:style-name="P7">A stack buffer overflow is also referred to as <text:span text:style-name="T39">stack smashing</text:span>.</text:p>
              </text:list-header>
            </text:list>
            <text:p text:style-name="P24"><text:tab/><text:span text:style-name="T16">A. stack framing</text:span><text:tab/><text:tab/><text:tab/><text:tab/><text:span text:style-name="T28">B. stack smashing</text:span></text:p>
            <text:p text:style-name="P24"><text:tab/><text:span text:style-name="T16">C. stack shocking</text:span><text:tab/><text:tab/><text:tab/><text:tab/><text:span text:style-name="T16">D. stack running</text:span></text:p>
          </table:table-cell>
        </table:table-row>
        <table:table-row table:style-name="Table1.5">
          <table:table-cell table:style-name="Table1.A1" office:value-type="string">
            <text:p text:style-name="P3">06</text:p>
          </table:table-cell>
          <table:table-cell table:style-name="Table1.B2" office:value-type="string">
            <text:list xml:id="list144957731407051" text:continue-numbering="true" text:style-name="WWNum1">
              <text:list-header>
                <text:p text:style-name="P7">The function of <text:span text:style-name="T39">shellcode</text:span> was to transfer control to a user command-line interpreter, which gave access to any program available on the system with the privileges of the attacked program.</text:p>
              </text:list-header>
            </text:list>
            <text:p text:style-name="P24"><text:tab/><text:span text:style-name="T28">A. shellcode</text:span><text:tab/><text:tab/><text:tab/><text:tab/><text:span text:style-name="T16">B. stacking</text:span></text:p>
            <text:p text:style-name="P24"><text:tab/><text:span text:style-name="T16">C. o-execute</text:span><text:tab/><text:tab/><text:tab/><text:tab/><text:span text:style-name="T16">D. memory management</text:span></text:p>
          </table:table-cell>
        </table:table-row>
        <table:table-row table:style-name="Table1.6">
          <table:table-cell table:style-name="Table1.A1" office:value-type="string">
            <text:p text:style-name="P3">07</text:p>
          </table:table-cell>
          <table:table-cell table:style-name="Table1.B2" office:value-type="string">
            <text:list xml:id="list144956215441473" text:continue-numbering="true" text:style-name="WWNum1">
              <text:list-header>
                <text:p text:style-name="P7">The Packet Storm Web site includes a large collection of packaged shellcode, including code that can:</text:p>
                <text:p text:style-name="P7"><text:tab/><text:span text:style-name="T18">A. </text:span><text:span text:style-name="T16">create a reverse shell </text:span><text:span text:style-name="T20">that</text:span><text:tab/><text:span text:style-name="T18">B. </text:span><text:span text:style-name="T16">flush firewall rules </text:span><text:span text:style-name="T20">block other</text:span></text:p>
              </text:list-header>
            </text:list>
            <text:p text:style-name="P16"><text:tab/> <text:s text:c="2"/><text:span text:style-name="T16">connects back to </text:span><text:span text:style-name="T20">the hacker</text:span><text:tab/> <text:s text:c="2"/><text:span text:style-name="T16">attacks that currently</text:span></text:p>
            <text:list xml:id="list144956417374964" text:continue-numbering="true" text:style-name="WWNum1">
              <text:list-header>
                <text:p text:style-name="P7"><text:tab/><text:span text:style-name="T18">C. </text:span><text:span text:style-name="T16">set up a listening </text:span><text:span text:style-name="T20">service to</text:span><text:tab/><text:span text:style-name="T30">D. </text:span><text:span text:style-name="T5">all the above</text:span></text:p>
              </text:list-header>
            </text:list>
            <text:p text:style-name="P18"><text:span text:style-name="T1"><text:tab/> <text:s text:c="2"/></text:span><text:span text:style-name="T11">launch a</text:span><text:span text:style-name="T1"> </text:span><text:span text:style-name="T11">remote shell when</text:span></text:p>
            <text:p text:style-name="P18"><text:span text:style-name="T1"><text:tab/> <text:s text:c="2"/></text:span><text:span text:style-name="T11">connected to</text:span></text:p>
          </table:table-cell>
        </table:table-row>
        <table:table-row table:style-name="Table1.7">
          <table:table-cell table:style-name="Table1.A1" office:value-type="string">
            <text:p text:style-name="P3">08</text:p>
          </table:table-cell>
          <table:table-cell table:style-name="Table1.B2" office:value-type="string">
            <text:list xml:id="list144956803924160" text:continue-numbering="true" text:style-name="WWNum1">
              <text:list-header>
                <text:p text:style-name="P8"><text:span text:style-name="T40">Compile-time defenses</text:span> aim to prevent or detect buffer overflows by instrumenting programs when they are compiled.</text:p>
              </text:list-header>
            </text:list>
            <text:p text:style-name="P18"><text:tab/><text:span text:style-name="T30">A. Compile-time defenses</text:span><text:span text:style-name="T49"><text:tab/><text:tab/></text:span><text:span text:style-name="T19">B. Shellcodes</text:span></text:p>
            <text:p text:style-name="P18"><text:tab/><text:span text:style-name="T19">C. Run-time defenses</text:span><text:span text:style-name="T49"><text:tab/><text:tab/><text:tab/></text:span><text:span text:style-name="T19">D. All the above</text:span></text:p>
          </table:table-cell>
        </table:table-row>
        <text:soft-page-break/>
        <table:table-row table:style-name="Table1.8">
          <table:table-cell table:style-name="Table1.A1" office:value-type="string">
            <text:p text:style-name="P3">09</text:p>
          </table:table-cell>
          <table:table-cell table:style-name="Table1.B2" office:value-type="string">
            <text:list xml:id="list144956728305025" text:continue-numbering="true" text:style-name="WWNum1">
              <text:list-header>
                <text:p text:style-name="P8"><text:span text:style-name="T41">Guard Pages</text:span> can prevent buffer overflow attacks, typically of global data, which <text:span text:style-name="T1">attempt to overwrite adjacent regions in the processes address space, such as the global offset table.</text:span></text:p>
              </text:list-header>
            </text:list>
            <text:p text:style-name="P25"><text:span text:style-name="T1"><text:tab/></text:span><text:span text:style-name="T11">A. MMUs</text:span><text:span text:style-name="T1"><text:tab/><text:tab/><text:tab/><text:tab/><text:tab/></text:span><text:span text:style-name="T5">B. Guard Pages</text:span></text:p>
            <text:p text:style-name="P25"><text:span text:style-name="T1"><text:tab/></text:span><text:span text:style-name="T11">C. Heaps</text:span><text:span text:style-name="T1"><text:tab/><text:tab/><text:tab/><text:tab/><text:tab/></text:span><text:span text:style-name="T11">D. All the above</text:span></text:p>
          </table:table-cell>
        </table:table-row>
        <table:table-row table:style-name="Table1.9">
          <table:table-cell table:style-name="Table1.A1" office:value-type="string">
            <text:p text:style-name="P3">10</text:p>
          </table:table-cell>
          <table:table-cell table:style-name="Table1.B2" office:value-type="string">
            <text:list xml:id="list144956619522401" text:continue-numbering="true" text:style-name="WWNum1">
              <text:list-header>
                <text:p text:style-name="P9"><text:span text:style-name="T41">All the above</text:span> is a form of overflow attack.</text:p>
              </text:list-header>
            </text:list>
            <text:p text:style-name="P19"><text:tab/><text:span text:style-name="T20">A. Heap overflows</text:span><text:span text:style-name="T50"><text:tab/><text:tab/><text:tab/><text:tab/></text:span><text:span text:style-name="T20">B. Return system call</text:span></text:p>
            <text:p text:style-name="P19"><text:tab/><text:span text:style-name="T20">C. Replacement stack frame</text:span><text:span text:style-name="T50"><text:tab/><text:tab/></text:span><text:span text:style-name="T31">D. All the above</text:span></text:p>
          </table:table-cell>
        </table:table-row>
        <table:table-row table:style-name="Table1.10">
          <table:table-cell table:style-name="Table1.A1" office:value-type="string">
            <text:p text:style-name="P3">11</text:p>
          </table:table-cell>
          <table:table-cell table:style-name="Table1.B2" office:value-type="string">
            <text:list xml:id="list144956079018573" text:continue-numbering="true" text:style-name="WWNum1">
              <text:list-header>
                <text:p text:style-name="P10">The <text:span text:style-name="T42">Morris Internet Worm</text:span> used a buffer overflow exploit in “fingerd” as one of its attack mechanisms.</text:p>
              </text:list-header>
            </text:list>
            <text:p text:style-name="P20"><text:tab/><text:span text:style-name="T21">A. Code Red Worm</text:span><text:span text:style-name="T51"><text:tab/><text:tab/><text:tab/><text:tab/></text:span><text:span text:style-name="T21">B. Sasser Worm</text:span></text:p>
            <text:p text:style-name="P20"><text:tab/><text:span text:style-name="T32">C. Morris Internet Worm</text:span><text:span text:style-name="T51"><text:tab/><text:tab/><text:tab/></text:span><text:span text:style-name="T21">D. Slammer Worm</text:span></text:p>
          </table:table-cell>
        </table:table-row>
        <table:table-row table:style-name="Table1.11">
          <table:table-cell table:style-name="Table1.A1" office:value-type="string">
            <text:p text:style-name="P3">12</text:p>
          </table:table-cell>
          <table:table-cell table:style-name="Table1.B2" office:value-type="string">
            <text:list xml:id="list144956919566657" text:continue-numbering="true" text:style-name="WWNum1">
              <text:list-header>
                <text:p text:style-name="P10">In 2003 the <text:span text:style-name="T42">Slammer Worm</text:span> exploited a buffer overflow in Microsoft SQL Server 2000.</text:p>
              </text:list-header>
            </text:list>
            <text:p text:style-name="P20"><text:tab/><text:span text:style-name="T32">A. Slammer Worm</text:span><text:span text:style-name="T51"><text:tab/><text:tab/><text:tab/><text:tab/></text:span><text:span text:style-name="T21">B. Morris Internet Worm</text:span></text:p>
            <text:p text:style-name="P20"><text:tab/><text:span text:style-name="T21">C. Sasser Worm</text:span><text:span text:style-name="T51"><text:tab/><text:tab/><text:tab/><text:tab/></text:span><text:span text:style-name="T21">D. Code Red Worm</text:span></text:p>
          </table:table-cell>
        </table:table-row>
        <table:table-row table:style-name="Table1.12">
          <table:table-cell table:style-name="Table1.A1" office:value-type="string">
            <text:p text:style-name="P3">13</text:p>
          </table:table-cell>
          <table:table-cell table:style-name="Table1.B2" office:value-type="string">
            <text:list xml:id="list144957098410447" text:continue-numbering="true" text:style-name="WWNum1">
              <text:list-header>
                <text:p text:style-name="P10">A buffer overflow in Microsoft Windows 2000/XP Local Security Authority Subsystem Service was exploited by the <text:span text:style-name="T42">Sasser Worm</text:span>.</text:p>
                <text:p text:style-name="P10"><text:tab/><text:span text:style-name="T21">A. Aleph One</text:span><text:span text:style-name="T51"><text:tab/><text:tab/><text:tab/><text:tab/></text:span><text:span text:style-name="T32">B. Sasser Worm</text:span></text:p>
                <text:p text:style-name="P10"><text:tab/><text:span text:style-name="T21">C. Slammer Worm</text:span><text:span text:style-name="T51"><text:tab/><text:tab/><text:tab/><text:tab/></text:span><text:span text:style-name="T21">C. none of the above</text:span></text:p>
              </text:list-header>
            </text:list>
          </table:table-cell>
        </table:table-row>
        <table:table-row table:style-name="Table1.13">
          <table:table-cell table:style-name="Table1.A1" office:value-type="string">
            <text:p text:style-name="P3">14</text:p>
          </table:table-cell>
          <table:table-cell table:style-name="Table1.B2" office:value-type="string">
            <text:p text:style-name="P2">The buffer is located <text:span text:style-name="T43">in the heap</text:span>.</text:p>
            <text:p text:style-name="P2"><text:tab/><text:span text:style-name="T33">A. in the heap</text:span><text:span text:style-name="T52"><text:tab/><text:tab/><text:tab/><text:tab/></text:span><text:span text:style-name="T22">B. on the stacking</text:span></text:p>
            <text:p text:style-name="P2"><text:span text:style-name="T52"><text:tab/></text:span><text:span text:style-name="T22">C. in the data section of the</text:span><text:span text:style-name="T52"><text:tab/><text:tab/></text:span><text:span text:style-name="T22">D. all of the above</text:span></text:p>
            <text:p text:style-name="P2"><text:tab/> <text:s text:c="2"/><text:span text:style-name="T22">process</text:span></text:p>
          </table:table-cell>
        </table:table-row>
        <table:table-row table:style-name="Table1.14">
          <table:table-cell table:style-name="Table1.A1" office:value-type="string">
            <text:p text:style-name="P3">15</text:p>
          </table:table-cell>
          <table:table-cell table:style-name="Table1.B2" office:value-type="string">
            <text:list xml:id="list3673775992" text:style-name="WWNum4">
              <text:list-header>
                <text:p text:style-name="P21"><text:span text:style-name="T43">Fuzzing</text:span> is a tool used to automatically identify potentially vulnerable programs.</text:p>
                <text:p text:style-name="P21"><text:tab/><text:span text:style-name="T22">A. Slamming</text:span><text:span text:style-name="T52"><text:tab/><text:tab/><text:tab/><text:tab/><text:tab/></text:span><text:span text:style-name="T22">B. Sledding</text:span></text:p>
                <text:p text:style-name="P21"><text:tab/><text:span text:style-name="T33">C. Fuzzing</text:span><text:span text:style-name="T52"><text:tab/><text:tab/><text:tab/><text:tab/><text:tab/></text:span><text:span text:style-name="T22">D. All of the above</text:span></text:p>
              </text:list-header>
            </text:list>
          </table:table-cell>
        </table:table-row>
        <table:table-row table:style-name="Table1.15">
          <table:table-cell table:style-name="Table1.A1" office:value-type="string">
            <text:p text:style-name="P3">16</text:p>
          </table:table-cell>
          <table:table-cell table:style-name="Table1.B2" office:value-type="string">
            <text:list xml:id="list144956944135160" text:continue-numbering="true" text:style-name="WWNum4">
              <text:list-header>
                <text:p text:style-name="P21">Traditionally the function of <text:span text:style-name="T44">shellcode</text:span> was to transfer control to a user command-line interpreter, which gave access to any program available on the system with the privileges of the attacked program.</text:p>
                <text:p text:style-name="P21"><text:tab/><text:span text:style-name="T33">A. shellcode</text:span><text:span text:style-name="T52"><text:tab/><text:tab/><text:tab/><text:tab/></text:span><text:span text:style-name="T22">B. C coding</text:span></text:p>
                <text:p text:style-name="P21"><text:tab/><text:span text:style-name="T22">C. assembly language</text:span><text:span text:style-name="T52"><text:tab/><text:tab/><text:tab/></text:span><text:span text:style-name="T22">D. all of the above</text:span></text:p>
              </text:list-header>
            </text:list>
          </table:table-cell>
        </table:table-row>
        <text:soft-page-break/>
        <table:table-row table:style-name="Table1.16">
          <table:table-cell table:style-name="Table1.A1" office:value-type="string">
            <text:p text:style-name="P3">17</text:p>
          </table:table-cell>
          <table:table-cell table:style-name="Table1.B2" office:value-type="string">
            <text:list xml:id="list144955937204084" text:continue-list="list144957098410447" text:style-name="WWNum1">
              <text:list-header>
                <text:p text:style-name="P11">“Incorrect Calculation of Buffer Size” is in the <text:span text:style-name="T44">Risky Resource Management</text:span> software error category.</text:p>
                <text:p text:style-name="P11"><text:tab/><text:span text:style-name="T23">A. Porous Defenses</text:span><text:span text:style-name="T53"><text:tab/><text:tab/><text:tab/></text:span><text:span text:style-name="T23">B. Allocation of Resources</text:span></text:p>
                <text:p text:style-name="P11"><text:tab/><text:span text:style-name="T34">C. Risky Resource Management</text:span><text:span text:style-name="T53"><text:tab/><text:tab/></text:span><text:span text:style-name="T23">D. Insecure Interaction Between</text:span></text:p>
                <text:p text:style-name="P11"><text:span text:style-name="T53"><text:tab/><text:tab/><text:tab/><text:tab/><text:tab/><text:tab/><text:tab/> <text:s text:c="2"/></text:span><text:span text:style-name="T23">Components</text:span></text:p>
              </text:list-header>
            </text:list>
          </table:table-cell>
        </table:table-row>
        <table:table-row table:style-name="Table1.17">
          <table:table-cell table:style-name="Table1.A1" office:value-type="string">
            <text:p text:style-name="P3">18</text:p>
          </table:table-cell>
          <table:table-cell table:style-name="Table1.B2" office:value-type="string">
            <text:list xml:id="list144957176521757" text:continue-numbering="true" text:style-name="WWNum1">
              <text:list-header>
                <text:p text:style-name="P11">“Improper Access Control (Authorization)” is in the <text:span text:style-name="T44">Porous Defenses</text:span> software error <text:span text:style-name="T1">category.</text:span></text:p>
                <text:p text:style-name="P11"><text:span text:style-name="T34"><text:tab/>A. Porous Defenses<text:tab/><text:tab/><text:tab/></text:span><text:span text:style-name="T23">B. Allocation of Resources</text:span></text:p>
                <text:p text:style-name="P11"><text:span text:style-name="T53"><text:tab/></text:span><text:span text:style-name="T23">C. Risky Resource Management</text:span><text:span text:style-name="T53"><text:tab/><text:tab/></text:span><text:span text:style-name="T23">D. Insecure Interaction Between</text:span></text:p>
                <text:p text:style-name="P5"><text:span text:style-name="T53"><text:tab/><text:tab/><text:tab/><text:tab/><text:tab/><text:tab/><text:tab/></text:span><text:span text:style-name="T23">Components</text:span></text:p>
              </text:list-header>
            </text:list>
          </table:table-cell>
        </table:table-row>
        <table:table-row table:style-name="Table1.18">
          <table:table-cell table:style-name="Table1.A1" office:value-type="string">
            <text:p text:style-name="P3">19</text:p>
          </table:table-cell>
          <table:table-cell table:style-name="Table1.B2" office:value-type="string">
            <text:list xml:id="list144956937428031" text:continue-numbering="true" text:style-name="WWNum1">
              <text:list-header>
                <text:p text:style-name="P11"><text:span text:style-name="T1">Defensive programming is sometimes referred to as </text:span><text:span text:style-name="T10">secure programming</text:span><text:span text:style-name="T1">.</text:span></text:p>
                <text:p text:style-name="P11"><text:span text:style-name="T1"><text:tab/></text:span><text:span text:style-name="T13">A. variable programming</text:span><text:span text:style-name="T3"><text:tab/><text:tab/><text:tab/></text:span><text:span text:style-name="T7">B. secure programming</text:span></text:p>
                <text:p text:style-name="P11"><text:span text:style-name="T3"><text:tab/></text:span><text:span text:style-name="T13">C. interpretive programming</text:span><text:span text:style-name="T3"><text:tab/><text:tab/></text:span><text:span text:style-name="T13">D. chroot programming</text:span></text:p>
              </text:list-header>
            </text:list>
          </table:table-cell>
        </table:table-row>
        <table:table-row table:style-name="Table1.19">
          <table:table-cell table:style-name="Table1.A1" office:value-type="string">
            <text:p text:style-name="P3">20</text:p>
          </table:table-cell>
          <table:table-cell table:style-name="Table1.B2" office:value-type="string">
            <text:list xml:id="list144957781762504" text:continue-numbering="true" text:style-name="WWNum1">
              <text:list-header>
                <text:p text:style-name="P11">Incorrect handling of program <text:span text:style-name="T44">input</text:span> is one of the most common failings in <text:span text:style-name="T1">software security.</text:span></text:p>
                <text:p text:style-name="P11"><text:span text:style-name="T1"><text:tab/></text:span><text:span text:style-name="T13">A. lines</text:span><text:span text:style-name="T3"><text:tab/><text:tab/><text:tab/><text:tab/><text:tab/></text:span><text:span text:style-name="T7">B. input</text:span></text:p>
                <text:p text:style-name="P11"><text:span text:style-name="T3"><text:tab/></text:span><text:span text:style-name="T13">C. output</text:span><text:span text:style-name="T3"><text:tab/><text:tab/><text:tab/><text:tab/><text:tab/></text:span><text:span text:style-name="T13">D. disciplines</text:span></text:p>
              </text:list-header>
            </text:list>
          </table:table-cell>
        </table:table-row>
        <table:table-row table:style-name="Table1.20">
          <table:table-cell table:style-name="Table1.A1" office:value-type="string">
            <text:p text:style-name="P3">21</text:p>
          </table:table-cell>
          <table:table-cell table:style-name="Table1.B2" office:value-type="string">
            <text:list xml:id="list144956193397010" text:continue-numbering="true" text:style-name="WWNum1">
              <text:list-header>
                <text:p text:style-name="P11"><text:span text:style-name="T44">Format string injection attack</text:span> is a program flaw that occurs when program input data can accidentally or deliberately influence the flow of execution of the program.</text:p>
                <text:p text:style-name="P11"><text:tab/><text:span text:style-name="T23">A. PHP attack</text:span><text:span text:style-name="T53"><text:tab/><text:tab/><text:tab/><text:tab/></text:span><text:span text:style-name="T34">B. Format string injection attack</text:span></text:p>
                <text:p text:style-name="P11"><text:tab/><text:span text:style-name="T23">C. XSS attack</text:span><text:span text:style-name="T53"><text:tab/><text:tab/><text:tab/><text:tab/></text:span><text:span text:style-name="T23">D. PHP remote code injection</text:span></text:p>
              </text:list-header>
            </text:list>
          </table:table-cell>
        </table:table-row>
        <table:table-row table:style-name="Table1.21">
          <table:table-cell table:style-name="Table1.A1" office:value-type="string">
            <text:p text:style-name="P3">22</text:p>
          </table:table-cell>
          <table:table-cell table:style-name="Table1.B2" office:value-type="string">
            <text:list xml:id="list144956287512998" text:continue-numbering="true" text:style-name="WWNum1">
              <text:list-header>
                <text:p text:style-name="P12">A <text:span text:style-name="T45">command injection</text:span> attack occurs when the input is used in the construction of a command that is subsequently executed by the system with the privileges of the Web server.</text:p>
                <text:p text:style-name="P12"><text:tab/><text:span text:style-name="T35">A. command injection</text:span><text:span text:style-name="T54"><text:tab/><text:tab/><text:tab/></text:span><text:span text:style-name="T24">B. SQL injection</text:span></text:p>
                <text:p text:style-name="P12"><text:tab/><text:span text:style-name="T24">C. code injection</text:span><text:span text:style-name="T54"><text:tab/><text:tab/><text:tab/><text:tab/></text:span><text:span text:style-name="T24">D. interpreter injection</text:span></text:p>
              </text:list-header>
            </text:list>
          </table:table-cell>
        </table:table-row>
        <table:table-row table:style-name="Table1.22">
          <table:table-cell table:style-name="Table1.A1" office:value-type="string">
            <text:p text:style-name="P3">23</text:p>
          </table:table-cell>
          <table:table-cell table:style-name="Table1.B2" office:value-type="string">
            <text:list xml:id="list144956884013322" text:continue-numbering="true" text:style-name="WWNum1">
              <text:list-header>
                <text:p text:style-name="P12">A <text:span text:style-name="T45">code injection</text:span> attack is where the input includes code that is then executed by the attacked system.</text:p>
              </text:list-header>
            </text:list>
            <text:p text:style-name="P22"><text:tab/><text:span text:style-name="T24">A. SQL injection</text:span><text:span text:style-name="T54"><text:tab/><text:tab/><text:tab/><text:tab/>B</text:span><text:span text:style-name="T24">. cross-site scripting</text:span></text:p>
            <text:p text:style-name="P22"><text:tab/><text:span text:style-name="T35">C. code injection</text:span><text:span text:style-name="T54"><text:tab/><text:tab/><text:tab/><text:tab/></text:span><text:span text:style-name="T24">D. interpreter injection</text:span></text:p>
          </table:table-cell>
        </table:table-row>
        <table:table-row table:style-name="Table1.23">
          <table:table-cell table:style-name="Table1.A1" office:value-type="string">
            <text:p text:style-name="P3">24</text:p>
          </table:table-cell>
          <table:table-cell table:style-name="Table1.B2" office:value-type="string">
            <text:list xml:id="list144955740535078" text:continue-numbering="true" text:style-name="WWNum1">
              <text:list-header>
                <text:p text:style-name="P12">Blocking assignment of form field values to global variables is one of the defenses available to prevent a <text:span text:style-name="T45">PHP remote code injection</text:span> attack.</text:p>
                <text:p text:style-name="P12"><text:tab/><text:span text:style-name="T35">A. PHP remote code injection</text:span><text:span text:style-name="T54"><text:tab/><text:tab/></text:span><text:span text:style-name="T24">B. mail injection</text:span></text:p>
                <text:p text:style-name="P12"><text:tab/><text:span text:style-name="T24">D. command injection</text:span><text:span text:style-name="T54"><text:tab/><text:tab/><text:tab/></text:span><text:span text:style-name="T24">D. SQL injection</text:span></text:p>
              </text:list-header>
            </text:list>
          </table:table-cell>
        </table:table-row>
        <text:soft-page-break/>
        <table:table-row table:style-name="Table1.24">
          <table:table-cell table:style-name="Table1.A1" office:value-type="string">
            <text:p text:style-name="P3">25</text:p>
          </table:table-cell>
          <table:table-cell table:style-name="Table1.B2" office:value-type="string">
            <text:list xml:id="list144957559223646" text:continue-numbering="true" text:style-name="WWNum1">
              <text:list-header>
                <text:p text:style-name="P12"><text:span text:style-name="T45">Cross-site scripting</text:span> attacks are vulnerabilities involving the inclusion of script code in the HTML content of a Web page displayed by a user’s browser.</text:p>
                <text:p text:style-name="P12"><text:tab/><text:span text:style-name="T24">A. PHP file inclusion</text:span><text:span text:style-name="T54"><text:tab/><text:tab/><text:tab/></text:span><text:span text:style-name="T24">B. Mail injection</text:span></text:p>
                <text:p text:style-name="P12"><text:tab/><text:span text:style-name="T24">C. Code injection</text:span><text:span text:style-name="T54"><text:tab/><text:tab/><text:tab/><text:tab/></text:span><text:span text:style-name="T35">D. Cross-site scripting</text:span></text:p>
              </text:list-header>
            </text:list>
          </table:table-cell>
        </table:table-row>
        <table:table-row table:style-name="Table1.25">
          <table:table-cell table:style-name="Table1.A1" office:value-type="string">
            <text:p text:style-name="P3">26</text:p>
          </table:table-cell>
          <table:table-cell table:style-name="Table1.B2" office:value-type="string">
            <text:list xml:id="list144956990875091" text:continue-numbering="true" text:style-name="WWNum1">
              <text:list-header>
                <text:p text:style-name="P12">A <text:span text:style-name="T46">regular expression</text:span> is a pattern composed of a sequence of characters that describe allowable input variants.</text:p>
                <text:p text:style-name="P12"><text:tab/><text:span text:style-name="T24">A. canonicalization</text:span><text:span text:style-name="T54"><text:tab/><text:tab/><text:tab/></text:span><text:span text:style-name="T24">B. race condition</text:span></text:p>
                <text:p text:style-name="P12"><text:tab/><text:span text:style-name="T35">C. regular expression</text:span><text:span text:style-name="T54"><text:tab/><text:tab/><text:tab/></text:span><text:span text:style-name="T24">D. shell script</text:span></text:p>
              </text:list-header>
            </text:list>
          </table:table-cell>
        </table:table-row>
        <table:table-row table:style-name="Table1.26">
          <table:table-cell table:style-name="Table1.A1" office:value-type="string">
            <text:p text:style-name="P3">27</text:p>
          </table:table-cell>
          <table:table-cell table:style-name="Table1.B2" office:value-type="string">
            <text:list xml:id="list144956769789560" text:continue-numbering="true" text:style-name="WWNum1">
              <text:list-header>
                <text:p text:style-name="P13">The intent of <text:span text:style-name="T46">fuzzing</text:span> is to determine whether the program or function correctly handles all abnormal inputs or whether it crashes or otherwise fails to respond appropriately.</text:p>
                <text:p text:style-name="P13"><text:tab/><text:span text:style-name="T25">A. shell scripting</text:span><text:span text:style-name="T55"><text:tab/><text:tab/><text:tab/></text:span><text:span text:style-name="T36">B. fuzzing</text:span></text:p>
                <text:p text:style-name="P13"><text:tab/><text:span text:style-name="T25">C. canonicalization</text:span><text:span text:style-name="T55"><text:tab/><text:tab/><text:tab/></text:span><text:span text:style-name="T25">D. deadlocking</text:span></text:p>
              </text:list-header>
            </text:list>
          </table:table-cell>
        </table:table-row>
        <table:table-row table:style-name="Table1.27">
          <table:table-cell table:style-name="Table1.A1" office:value-type="string">
            <text:p text:style-name="P3">28</text:p>
          </table:table-cell>
          <table:table-cell table:style-name="Table1.B2" office:value-type="string">
            <text:list xml:id="list144955866905539" text:continue-numbering="true" text:style-name="WWNum1">
              <text:list-header>
                <text:p text:style-name="P13">A stead reduction in memory available on the heap to the point where it is completely exhausted is known as a <text:span text:style-name="T46">memory leak</text:span>.</text:p>
              </text:list-header>
            </text:list>
            <text:p text:style-name="P23"><text:tab/><text:span text:style-name="T25">A. fuzzing</text:span><text:span text:style-name="T55"><text:tab/><text:tab/><text:tab/><text:tab/><text:tab/></text:span><text:span text:style-name="T25">B. deadlock</text:span></text:p>
            <text:p text:style-name="P23"><text:tab/><text:span text:style-name="T25">C. memory injection</text:span><text:span text:style-name="T55"><text:tab/><text:tab/><text:tab/></text:span><text:span text:style-name="T36">D. memory leak</text:span></text:p>
          </table:table-cell>
        </table:table-row>
        <table:table-row table:style-name="Table1.28">
          <table:table-cell table:style-name="Table1.A1" office:value-type="string">
            <text:p text:style-name="P4">29</text:p>
          </table:table-cell>
          <table:table-cell table:style-name="Table1.B2" office:value-type="string">
            <text:list xml:id="list144957122311467" text:continue-numbering="true" text:style-name="WWNum1">
              <text:list-header>
                <text:p text:style-name="P13">The most common technique for using an appropriate synchronization mechanism to serialize the accesses to prevent errors is to acquire a <text:span text:style-name="T46">lock</text:span> on the shared file, ensuring that each process has appropriate access in turn</text:p>
                <text:p text:style-name="P13"><text:tab/><text:span text:style-name="T36">A. lock</text:span><text:span text:style-name="T55"><text:tab/><text:tab/><text:tab/><text:tab/><text:tab/></text:span><text:span text:style-name="T25">B. code injection</text:span></text:p>
                <text:p text:style-name="P13"><text:tab/><text:span text:style-name="T25">C. chroot jail</text:span><text:span text:style-name="T55"><text:tab/><text:tab/><text:tab/><text:tab/></text:span><text:span text:style-name="T25">D. privilege escalation</text:span></text:p>
              </text:list-header>
            </text:list>
          </table:table-cell>
        </table:table-row>
        <table:table-row table:style-name="Table1.29">
          <table:table-cell table:style-name="Table1.A1" office:value-type="string">
            <text:p text:style-name="P4">30</text:p>
          </table:table-cell>
          <table:table-cell table:style-name="Table1.B2" office:value-type="string">
            <text:list xml:id="list144955947609921" text:continue-numbering="true" text:style-name="WWNum1">
              <text:list-header>
                <text:p text:style-name="P13"><text:span text:style-name="T47">Environment variables</text:span> are a collection of string values inherited by each process from its parent that can affect the way a running process behaves.</text:p>
                <text:p text:style-name="P13"><text:tab/><text:span text:style-name="T25">A. Deadlocks</text:span><text:span text:style-name="T55"><text:tab/><text:tab/><text:tab/><text:tab/></text:span><text:span text:style-name="T25">B. Privileges</text:span></text:p>
                <text:p text:style-name="P13"><text:tab/><text:span text:style-name="T36">C. Environment variables</text:span><text:span text:style-name="T55"><text:tab/><text:tab/></text:span><text:span text:style-name="T25">D. Race conditions</text:span></text:p>
              </text:list-header>
            </text:list>
          </table:table-cell>
        </table:table-row>
        <table:table-row table:style-name="Table1.30">
          <table:table-cell table:style-name="Table1.A30" office:value-type="string">
            <text:p text:style-name="P4">31</text:p>
          </table:table-cell>
          <table:table-cell table:style-name="Table1.B2" office:value-type="string">
            <text:list xml:id="list144957034389465" text:continue-numbering="true" text:style-name="WWNum1">
              <text:list-header>
                <text:p text:style-name="P13">The most common variant of injecting malicious script content into pages returned to users by the targeted sites is the <text:span text:style-name="T47">XSS reflection</text:span> vulnerability.</text:p>
                <text:p text:style-name="P13"><text:tab/><text:span text:style-name="T37">A. XSS reflection</text:span><text:span text:style-name="T56"><text:tab/><text:tab/><text:tab/><text:tab/></text:span><text:span text:style-name="T27">B. chroot jail</text:span></text:p>
                <text:list>
                  <text:list-header>
                    <text:p text:style-name="P13"><text:tab/><text:span text:style-name="T26">C. atomic bomb</text:span><text:span text:style-name="T57"><text:tab/><text:tab/><text:tab/><text:tab/></text:span><text:span text:style-name="T26">D. PHP file inclusion</text:span></text:p>
                  </text:list-header>
                </text:list>
              </text:list-header>
            </text:list>
          </table:table-cell>
        </table:table-row>
      </table:table>
      <text:list xml:id="list144956458131454" text:continue-numbering="true" text:style-name="WWNum1">
        <text:list-header>
          <text:p text:style-name="P2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Inconsolata for Powerline" officeooo:rsid="001609fb" officeooo:paragraph-rsid="001609f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wrence L. O’Boyle II<text:tab/><text:tab/>12/03/2018</text:p>
      </style:header>
      <style:footer>
        <text:p text:style-name="Footer"><text:tab/><text:tab/><text:page-number text:select-page="current">4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0:17:05.012052843</meta:creation-date>
    <dc:date>2018-03-12T13:14:59.805257645</dc:date>
    <meta:editing-duration>PT11M36S</meta:editing-duration>
    <meta:editing-cycles>3</meta:editing-cycles>
    <meta:generator>LibreOffice/6.0.2.1.0$Linux_X86_64 LibreOffice_project/00m0$Build-1</meta:generator>
    <meta:print-date>2018-03-12T13:15:07.762415200</meta:print-date>
    <meta:document-statistic meta:table-count="1" meta:image-count="0" meta:object-count="0" meta:page-count="4" meta:paragraph-count="131" meta:word-count="1043" meta:character-count="6415" meta:non-whitespace-character-count="5232"/>
  </office:meta>
</office:document-meta>
</file>