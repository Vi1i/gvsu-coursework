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Fira Mono for Powerline" svg:font-family="'Fira Mono for Powerline'" style:font-family-generic="roman" style:font-pitch="variable"/>
    <style:font-face style:name="Fira Mono for Powerline1" svg:font-family="'Fira Mono for Powerline'" style:font-family-generic="swiss" style:font-pitch="variable"/>
    <style:font-face style:name="Fira Mono for Powerline2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consolata for Powerline" fo:font-size="14pt" fo:font-weight="bold" officeooo:rsid="001e233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Inconsolata for Powerline" fo:font-size="12pt" fo:font-weight="bold" officeooo:rsid="001e2335" officeooo:paragraph-rsid="001e233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Inconsolata for Powerline" fo:font-size="12pt" fo:font-weight="bold" officeooo:rsid="001e2335" officeooo:paragraph-rsid="001e2335" style:font-size-asian="10.5pt" style:font-weight-asian="bold" style:font-size-complex="12pt" style:font-weight-complex="bold"/>
    </style:style>
    <style:style style:name="P4" style:family="paragraph" style:parent-style-name="Header">
      <style:text-properties style:font-name="Inconsolata for Powerline" officeooo:rsid="001e2335" officeooo:paragraph-rsid="001e23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YOD Security Implementation for Small Organizations</text:p>
      <text:p text:style-name="P1"/>
      <text:p text:style-name="P2">Abstract(5-10)</text:p>
      <text:p text:style-name="P3"/>
      <text:p text:style-name="P2">Effectiveness of the Idea or Solution(5-20)</text:p>
      <text:p text:style-name="P3"/>
      <text:p text:style-name="P2">Drawback of the Idea or Solution(5-20)</text:p>
      <text:p text:style-name="P3"/>
      <text:p text:style-name="P2">Conclusion(3-10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Fira Mono for Powerline" svg:font-family="'Fira Mono for Powerline'" style:font-family-generic="roman" style:font-pitch="variable"/>
    <style:font-face style:name="Fira Mono for Powerline1" svg:font-family="'Fira Mono for Powerline'" style:font-family-generic="swiss" style:font-pitch="variable"/>
    <style:font-face style:name="Fira Mono for Powerline2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Mono for Powerline" fo:font-size="12pt" fo:language="en" fo:country="US" style:letter-kerning="true" style:font-name-asian="Fira Mono for Powerline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Mono for Powerline" fo:font-size="12pt" fo:language="en" fo:country="US" style:letter-kerning="true" style:font-name-asian="Fira Mono for Powerline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ira Mono for Powerline1" fo:font-family="'Fira Mono for Powerline'" style:font-family-generic="swiss" style:font-pitch="variable" fo:font-size="14pt" style:font-name-asian="Fira Mono for Powerline2" style:font-family-asian="'Fira Mono for Powerlin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consolata for Powerline" officeooo:rsid="001e2335" officeooo:paragraph-rsid="001e233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awrence L. O’Boyle II<text:tab/><text:tab/>19/02/2018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3:05:21.340401935</meta:creation-date>
    <dc:date>2018-02-19T14:28:15.112749204</dc:date>
    <meta:editing-duration>PT1H2M33S</meta:editing-duration>
    <meta:editing-cycles>1</meta:editing-cycles>
    <meta:generator>LibreOffice/6.0.1.1$Linux_X86_64 LibreOffice_project/00m0$Build-1</meta:generator>
    <meta:document-statistic meta:table-count="0" meta:image-count="0" meta:object-count="0" meta:page-count="1" meta:paragraph-count="7" meta:word-count="26" meta:character-count="200" meta:non-whitespace-character-count="178"/>
  </office:meta>
</office:document-meta>
</file>